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898" style:family="paragraph" style:name="P56">
      <style:paragraph-properties fo:line-height="150%" fo:text-align="center" fo:margin-left="1cm" fo:margin-right="0cm" fo:text-indent="-0.7497cm">
        <style:tab-stops>
          <style:tab-stop style:position="4.001cm" style:type="left"/>
        </style:tab-stops>
      </style:paragraph-properties>
      <style:text-properties fo:color="#000000" fo:font-family="Gill Sans MT" style:font-family-complex="Gill Sans MT" fo:font-size="9pt" style:font-size-complex="9pt" fo:language="pt" style:language-complex="ar" fo:country="PT" style:country-complex="SA" fo:font-weight="bold"/>
    </style:style>
    <style:style style:parent-style-name="929" style:family="text" style:name="T484">
      <style:text-properties fo:color="#000000" fo:font-family="Tahoma" style:font-family-complex="Tahoma" fo:font-size="9pt" style:font-size-complex="9pt" fo:language="pt" style:language-complex="ar" fo:country="PT" style:country-complex="SA" fo:font-weight="bold"/>
    </style:style>
    <style:style style:family="text" style:name="T485">
      <style:text-properties fo:color="#000000" fo:font-family="Gadugi" style:font-family-complex="Gadugi" fo:font-size="10pt" style:font-size-complex="10pt" fo:language="pt" style:language-complex="ar" fo:country="PT" style:country-complex="SA" fo:font-weight="bold"/>
    </style:style>
    <style:style style:family="text" style:name="T486">
      <style:text-properties fo:color="#000000" fo:font-family="Tahoma" style:font-family-complex="Tahoma" fo:font-size="9pt" style:font-size-complex="9pt" fo:language="pt" style:language-complex="ar" fo:country="PT" style:country-complex="SA" fo:font-weight="bold"/>
    </style:style>
    <style:style style:family="text" style:name="T487">
      <style:text-properties fo:color="#000000" fo:font-family="Gill Sans MT" style:font-family-complex="Gill Sans MT" fo:font-size="9pt" style:font-size-complex="9pt" fo:language="pt" style:language-complex="ar" fo:country="PT" style:country-complex="SA" fo:font-weight="bold"/>
    </style:style>
    <style:style style:parent-style-name="896" style:family="paragraph" style:name="P57">
      <style:paragraph-properties fo:line-height="150%" fo:text-align="center" fo:margin-left="1cm" fo:margin-right="0cm" fo:text-indent="-0.7497cm">
        <style:tab-stops>
          <style:tab-stop style:position="4.001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 fo:font-weight="bold"/>
    </style:style>
    <style:style style:family="text" style:name="T488">
      <style:text-properties fo:color="#000000" fo:font-family="Gadugi" style:font-family-complex="Gadugi" fo:font-size="11pt" style:font-size-complex="11pt" fo:language="pt" style:language-complex="ar" fo:country="PT" style:country-complex="SA" fo:font-weight="bold"/>
    </style:style>
    <style:style style:family="text" style:name="T489">
      <style:text-properties fo:color="#000000" fo:font-family="Gadugi" style:font-family-complex="Gadugi" fo:font-size="11pt" style:font-size-complex="11pt" fo:language="pt" style:language-complex="ar" fo:country="PT" style:country-complex="SA" fo:font-weight="bold"/>
    </style:style>
    <style:style style:family="text" style:name="T490">
      <style:text-properties fo:color="#000000" fo:font-family="Gill Sans MT" style:font-family-complex="Gill Sans MT" fo:font-size="11pt" style:font-size-complex="11pt" fo:language="pt" style:language-complex="ar" fo:country="PT" style:country-complex="SA" fo:font-weight="bold"/>
    </style:style>
    <style:style style:parent-style-name="896" style:family="paragraph" style:name="P58">
      <style:paragraph-properties fo:line-height="150%" fo:text-align="center" fo:margin-left="1cm" fo:margin-right="0cm" fo:text-indent="0cm">
        <style:tab-stops>
          <style:tab-stop style:position="4.001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 fo:font-weight="bold"/>
    </style:style>
    <style:style style:family="text" style:name="T491">
      <style:text-properties fo:color="#000000" fo:font-family="Gadugi" style:font-family-complex="Gadugi" fo:font-size="11pt" style:font-size-complex="11pt" fo:language="pt" style:language-complex="ar" fo:country="PT" style:country-complex="SA" fo:font-weight="bold"/>
    </style:style>
    <style:style style:family="text" style:name="T492">
      <style:text-properties fo:color="#000000" fo:font-family="Gadugi" style:font-family-complex="Gadugi" fo:font-size="11pt" style:font-size-complex="11pt" fo:language="pt" style:language-complex="ar" fo:country="PT" style:country-complex="SA" fo:font-weight="bold"/>
    </style:style>
    <style:style style:family="text" style:name="T493">
      <style:text-properties fo:color="#000000" fo:font-family="Gill Sans MT" style:font-family-complex="Gill Sans MT" fo:font-size="11pt" style:font-size-complex="11pt" fo:language="pt" style:language-complex="ar" fo:country="PT" style:country-complex="SA" fo:font-weight="bold"/>
    </style:style>
    <style:style style:parent-style-name="896" style:family="paragraph" style:name="P59">
      <style:paragraph-properties fo:line-height="115%"/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494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495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496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60">
      <style:paragraph-properties fo:text-align="left" fo:margin-left="0cm" fo:margin-right="0cm" fo:text-indent="0cm" fo:margin-top="0pt" fo:margin-bottom="0pt">
        <style:tab-stops>
          <style:tab-stop style:position="4.001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497">
      <style:text-properties fo:color="#000000" fo:font-family="Gadugi" style:font-family-complex="Gadugi" fo:font-size="10pt" style:font-size-complex="10pt" fo:language="pt" style:language-complex="ar" fo:country="PT" style:country-complex="SA" fo:font-weight="bold"/>
    </style:style>
    <style:style style:family="text" style:name="T498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499">
      <style:text-properties fo:color="#000000" fo:font-family="Gadugi" style:font-family-complex="Gadugi" fo:font-size="10pt" style:font-size-complex="10pt" fo:language="pt" style:language-complex="ar" fo:country="PT" style:country-complex="SA" fo:font-weight="bold"/>
    </style:style>
    <style:style style:family="text" style:name="T500">
      <style:text-properties fo:color="#000000" fo:font-family="Gadugi" style:font-family-complex="Gadugi" fo:font-size="11pt" style:font-size-complex="11pt" fo:language="pt" style:language-complex="ar" fo:country="PT" style:country-complex="SA"/>
    </style:style>
    <style:style style:family="text" style:name="T501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61">
      <style:paragraph-properties fo:text-align="left" fo:margin-left="0cm" fo:margin-right="0cm" fo:text-indent="0cm" fo:margin-top="0pt" fo:margin-bottom="0pt">
        <style:tab-stops>
          <style:tab-stop style:position="4.001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 fo:font-weight="bold"/>
    </style:style>
    <style:style style:family="text" style:name="T502">
      <style:text-properties fo:color="#000000" fo:font-family="Gadugi" style:font-family-complex="Gadugi" fo:font-size="5pt" style:font-size-complex="5pt" fo:language="pt" style:language-complex="ar" fo:country="PT" style:country-complex="SA" fo:font-weight="bold"/>
    </style:style>
    <style:style style:family="text" style:name="T503">
      <style:text-properties fo:color="#000000" fo:font-family="Gadugi" style:font-family-complex="Gadugi" fo:font-size="5pt" style:font-size-complex="5pt" fo:language="pt" style:language-complex="ar" fo:country="PT" style:country-complex="SA" fo:font-weight="bold"/>
    </style:style>
    <style:style style:family="text" style:name="T504">
      <style:text-properties fo:color="#000000" fo:font-family="Gill Sans MT" style:font-family-complex="Gill Sans MT" fo:font-size="11pt" style:font-size-complex="11pt" fo:language="pt" style:language-complex="ar" fo:country="PT" style:country-complex="SA" fo:font-weight="bold"/>
    </style:style>
    <style:style style:parent-style-name="896" style:family="paragraph" style:name="P62">
      <style:paragraph-properties fo:text-align="left" fo:margin-left="0cm" fo:margin-right="0cm" fo:text-indent="0cm" fo:margin-top="0pt" fo:margin-bottom="0pt">
        <style:tab-stops>
          <style:tab-stop style:position="4.001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505">
      <style:text-properties fo:color="#000000" fo:font-family="Gadugi" style:font-family-complex="Gadugi" fo:font-size="10pt" style:font-size-complex="10pt" fo:language="pt" style:language-complex="ar" fo:country="PT" style:country-complex="SA" fo:font-weight="bold"/>
    </style:style>
    <style:style style:family="text" style:name="T506">
      <style:text-properties fo:color="#000000" fo:font-family="Gadugi" style:font-family-complex="Gadugi" fo:font-size="11pt" style:font-size-complex="11pt" fo:language="pt" style:language-complex="ar" fo:country="PT" style:country-complex="SA"/>
    </style:style>
    <style:style style:family="text" style:name="T507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63">
      <style:paragraph-properties fo:text-align="left" fo:margin-left="0cm" fo:margin-right="0cm" fo:text-indent="0cm" fo:margin-top="0pt" fo:margin-bottom="0pt">
        <style:tab-stops>
          <style:tab-stop style:position="4.001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 fo:font-weight="bold"/>
    </style:style>
    <style:style style:family="text" style:name="T508">
      <style:text-properties fo:color="#000000" fo:font-family="Gadugi" style:font-family-complex="Gadugi" fo:font-size="5pt" style:font-size-complex="5pt" fo:language="pt" style:language-complex="ar" fo:country="PT" style:country-complex="SA" fo:font-weight="bold"/>
    </style:style>
    <style:style style:family="text" style:name="T509">
      <style:text-properties fo:color="#000000" fo:font-family="Gadugi" style:font-family-complex="Gadugi" fo:font-size="5pt" style:font-size-complex="5pt" fo:language="pt" style:language-complex="ar" fo:country="PT" style:country-complex="SA" fo:font-weight="bold"/>
    </style:style>
    <style:style style:family="text" style:name="T510">
      <style:text-properties fo:color="#000000" fo:font-family="Gill Sans MT" style:font-family-complex="Gill Sans MT" fo:font-size="11pt" style:font-size-complex="11pt" fo:language="pt" style:language-complex="ar" fo:country="PT" style:country-complex="SA" fo:font-weight="bold"/>
    </style:style>
    <style:style style:parent-style-name="896" style:family="paragraph" style:name="P64">
      <style:paragraph-properties fo:text-align="left" fo:margin-left="0cm" fo:margin-right="0cm" fo:text-indent="0cm" fo:margin-top="0pt" fo:margin-bottom="0pt">
        <style:tab-stops>
          <style:tab-stop style:position="4.001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511">
      <style:text-properties fo:color="#000000" fo:font-family="Gadugi" style:font-family-complex="Gadugi" fo:font-size="10pt" style:font-size-complex="10pt" fo:language="pt" style:language-complex="ar" fo:country="PT" style:country-complex="SA" fo:font-weight="bold"/>
    </style:style>
    <style:style style:family="text" style:name="T512">
      <style:text-properties fo:color="#000000" fo:font-family="Gadugi" style:font-family-complex="Gadugi" fo:font-size="11pt" style:font-size-complex="11pt" fo:language="pt" style:language-complex="ar" fo:country="PT" style:country-complex="SA"/>
    </style:style>
    <style:style style:family="text" style:name="T513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65">
      <style:paragraph-properties fo:text-align="left" fo:margin-left="0cm" fo:margin-right="0cm" fo:text-indent="0cm" fo:margin-top="0pt" fo:margin-bottom="0pt">
        <style:tab-stops>
          <style:tab-stop style:position="4.001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514">
      <style:text-properties fo:color="#000000" fo:font-family="Gadugi" style:font-family-complex="Gadugi" fo:font-size="5pt" style:font-size-complex="9pt" fo:language="pt" style:language-complex="ar" fo:country="PT" style:country-complex="SA"/>
    </style:style>
    <style:style style:family="text" style:name="T515">
      <style:text-properties fo:color="#000000" fo:font-family="Gadugi" style:font-family-complex="Gadugi" fo:font-size="5pt" style:font-size-complex="9pt" fo:language="pt" style:language-complex="ar" fo:country="PT" style:country-complex="SA"/>
    </style:style>
    <style:style style:family="text" style:name="T516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66">
      <style:paragraph-properties fo:text-align="left" fo:margin-left="0cm" fo:margin-right="0cm" fo:text-indent="0cm" fo:margin-top="0pt" fo:margin-bottom="0pt">
        <style:tab-stops>
          <style:tab-stop style:position="4.001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517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18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parent-style-name="881" style:family="text" style:name="T519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1059" style:family="text" style:name="T520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1059" style:family="text" style:name="T521">
      <style:text-properties fo:color="#000000" fo:font-family="Tahoma" style:font-family-complex="Tahoma" fo:font-size="10pt" style:font-size-complex="10pt" fo:language="pt" style:language-complex="ar" fo:country="BR" style:country-complex="SA"/>
    </style:style>
    <style:style style:family="text" style:name="T522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523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67">
      <style:paragraph-properties fo:text-align="left" fo:margin-left="0cm" fo:margin-right="0cm" fo:text-indent="0cm" fo:margin-top="0pt" fo:margin-bottom="0pt">
        <style:tab-stops>
          <style:tab-stop style:position="4.001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524">
      <style:text-properties fo:color="#000000" fo:font-family="Gadugi" style:font-family-complex="Gadugi" fo:font-size="5pt" style:font-size-complex="7pt" fo:language="pt" style:language-complex="ar" fo:country="PT" style:country-complex="SA"/>
    </style:style>
    <style:style style:family="text" style:name="T525">
      <style:text-properties fo:color="#000000" fo:font-family="Gadugi" style:font-family-complex="Gadugi" fo:font-size="5pt" style:font-size-complex="7pt" fo:language="pt" style:language-complex="ar" fo:country="PT" style:country-complex="SA"/>
    </style:style>
    <style:style style:family="text" style:name="T526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68">
      <style:paragraph-properties fo:text-align="left" fo:margin-left="0cm" fo:margin-right="0cm" fo:text-indent="0cm" fo:margin-top="0pt" fo:margin-bottom="0pt">
        <style:tab-stops>
          <style:tab-stop style:position="4.001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527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28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parent-style-name="881" style:family="text" style:name="T529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1059" style:family="text" style:name="T530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1059" style:family="text" style:name="T531">
      <style:text-properties fo:color="#000000" fo:font-family="Tahoma" style:font-family-complex="Tahoma" fo:font-size="10pt" style:font-size-complex="10pt" fo:language="pt" style:language-complex="ar" fo:country="PT" style:country-complex="SA"/>
    </style:style>
    <style:style style:family="text" style:name="T532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33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34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535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69">
      <style:paragraph-properties fo:margin-left="1cm" fo:margin-right="0cm" fo:text-indent="0cm">
        <style:tab-stops>
          <style:tab-stop style:position="4.001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536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37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38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70">
      <style:paragraph-properties fo:margin-left="1cm" fo:margin-right="0cm" fo:text-indent="0cm">
        <style:tab-stops>
          <style:tab-stop style:position="4.001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539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40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41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71">
      <style:paragraph-properties fo:line-height="150%" fo:text-align="justify" fo:margin-left="1cm" fo:margin-right="0cm" fo:text-indent="1.997cm"/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542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43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44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72">
      <style:paragraph-properties fo:line-height="150%" fo:text-align="justify" fo:margin-left="0cm" fo:margin-right="0.1005cm" fo:text-indent="1.997cm" fo:margin-top="0pt" fo:margin-bottom="0.05pt"/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545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81" style:family="text" style:name="T546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1060" style:family="text" style:name="T547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1060" style:family="text" style:name="T548">
      <style:text-properties fo:color="#000000" fo:font-family="Gadugi" style:font-family-complex="Gadugi" fo:font-size="10pt" style:font-size-complex="10pt" fo:language="pt" style:language-complex="ar" fo:country="PT" style:country-complex="SA" fo:font-weight="bold"/>
    </style:style>
    <style:style style:family="text" style:name="T549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50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51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52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553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73">
      <style:paragraph-properties fo:line-height="150%" fo:text-align="justify" fo:margin-left="1cm" fo:margin-right="0.0635cm" fo:text-indent="1.997cm" fo:margin-top="0pt" fo:margin-bottom="0.05pt"/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554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55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56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8" style:family="paragraph" style:name="P74">
      <style:paragraph-properties fo:line-height="150%" fo:text-align="center" fo:margin-left="0cm" fo:margin-right="0cm" fo:text-indent="0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 fo:font-weight="bold"/>
    </style:style>
    <style:style style:parent-style-name="929" style:family="text" style:name="T557">
      <style:text-properties fo:color="#000000" fo:font-family="Tahoma" style:font-family-complex="Tahoma" fo:font-size="10pt" style:font-size-complex="10pt" fo:language="pt" style:language-complex="ar" fo:country="PT" style:country-complex="SA" fo:font-weight="bold"/>
    </style:style>
    <style:style style:family="text" style:name="T558">
      <style:text-properties fo:color="#000000" fo:font-family="Gadugi" style:font-family-complex="Gadugi" fo:font-size="10pt" style:font-size-complex="10pt" fo:language="pt" style:language-complex="ar" fo:country="PT" style:country-complex="SA" fo:font-weight="bold"/>
    </style:style>
    <style:style style:family="text" style:name="T559">
      <style:text-properties fo:color="#000000" fo:font-family="Tahoma" style:font-family-complex="Tahoma" fo:font-size="10pt" style:font-size-complex="10pt" fo:language="pt" style:language-complex="ar" fo:country="PT" style:country-complex="SA" fo:font-weight="bold"/>
    </style:style>
    <style:style style:family="text" style:name="T560">
      <style:text-properties fo:color="#000000" fo:font-family="Gill Sans MT" style:font-family-complex="Gill Sans MT" fo:font-size="9pt" style:font-size-complex="9pt" fo:language="pt" style:language-complex="ar" fo:country="PT" style:country-complex="SA" fo:font-weight="bold"/>
    </style:style>
    <style:style style:parent-style-name="898" style:family="paragraph" style:name="P75">
      <style:paragraph-properties fo:line-height="150%" fo:text-align="justify" fo:margin-left="1cm" fo:margin-right="0cm" fo:text-indent="0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561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62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63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898" style:family="paragraph" style:name="P76">
      <style:paragraph-properties fo:line-height="150%" fo:text-align="justify" fo:margin-left="0cm" fo:margin-right="0cm" fo:text-indent="2.097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564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65">
      <style:text-properties fo:color="#000000" fo:font-family="Gadugi" style:font-family-complex="Gadugi" fo:font-size="10pt" style:font-size-complex="10pt" fo:language="en" style:language-complex="ar" fo:country="US" style:country-complex="SA"/>
    </style:style>
    <style:style style:family="text" style:name="T566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67">
      <style:text-properties fo:color="#000000" fo:font-family="Gadugi" style:font-family-complex="Gadugi" fo:font-size="10pt" style:font-size-complex="10pt" fo:language="en" style:language-complex="ar" fo:country="US" style:country-complex="SA"/>
    </style:style>
    <style:style style:family="text" style:name="T568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69">
      <style:text-properties fo:color="#000000" fo:font-family="Gadugi" style:font-family-complex="Gadugi" fo:font-size="10pt" style:font-size-complex="10pt" fo:language="en" style:language-complex="ar" fo:country="US" style:country-complex="SA"/>
    </style:style>
    <style:style style:family="text" style:name="T570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71">
      <style:text-properties fo:color="#000000" fo:font-family="Gadugi" style:font-family-complex="Gadugi" fo:font-size="10pt" style:font-size-complex="10pt" fo:language="en" style:language-complex="ar" fo:country="US" style:country-complex="SA"/>
    </style:style>
    <style:style style:family="text" style:name="T572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73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74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898" style:family="paragraph" style:name="P77">
      <style:paragraph-properties fo:line-height="150%" fo:text-align="justify" fo:margin-left="1cm" fo:margin-right="0cm" fo:text-indent="0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575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76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77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904" style:family="paragraph" style:name="P78">
      <style:paragraph-properties fo:line-height="150%" fo:text-align="center" fo:margin-top="0pt" fo:margin-bottom="0.05pt"/>
      <style:text-properties fo:color="#000000" fo:font-family="Lucida Sans" style:font-family-complex="Lucida Sans" fo:font-size="13pt" style:font-size-complex="13pt" fo:language="pt" style:language-complex="ar" fo:country="PT" style:country-complex="SA" style:text-underline-type="single" style:text-underline-style="solid" style:text-underline-width="auto" style:text-underline-color="font-color"/>
    </style:style>
    <style:style style:parent-style-name="929" style:family="text" style:name="T578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/>
    </style:style>
    <style:style style:family="text" style:name="T579">
      <style:text-properties fo:color="#000000" fo:font-family="Gadugi" style:font-family-complex="Gadugi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family="text" style:name="T580">
      <style:text-properties fo:color="#000000" fo:font-family="Gadugi" style:font-family-complex="Gadugi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family="text" style:name="T581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/>
    </style:style>
    <style:style style:family="text" style:name="T582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/>
    </style:style>
    <style:style style:parent-style-name="904" style:family="paragraph" style:name="P79">
      <style:paragraph-properties fo:line-height="150%" fo:text-align="center" fo:margin-top="0pt" fo:margin-bottom="0.05pt"/>
      <style:text-properties fo:color="#000000" fo:font-family="Lucida Sans" style:font-family-complex="Lucida Sans" fo:font-size="13pt" style:font-size-complex="13pt" fo:language="pt" style:language-complex="ar" fo:country="PT" style:country-complex="SA" style:text-underline-type="single" style:text-underline-style="solid" style:text-underline-width="auto" style:text-underline-color="font-color"/>
    </style:style>
    <style:style style:parent-style-name="929" style:family="text" style:name="T583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/>
    </style:style>
    <style:style style:family="text" style:name="T584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/>
    </style:style>
    <style:style style:family="text" style:name="T585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/>
    </style:style>
    <style:style style:parent-style-name="898" style:family="paragraph" style:name="P80">
      <style:paragraph-properties fo:line-height="150%" fo:text-align="justify" fo:margin-left="0cm" fo:margin-right="0cm" fo:text-indent="1.997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586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87">
      <style:text-properties fo:color="#000000" fo:font-family="Gadugi" style:font-family-complex="Gadugi" fo:font-size="10pt" style:font-size-complex="10pt" fo:language="en" style:language-complex="ar" fo:country="US" style:country-complex="SA"/>
    </style:style>
    <style:style style:family="text" style:name="T588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89">
      <style:text-properties fo:color="#000000" fo:font-family="Gadugi" style:font-family-complex="Gadugi" fo:font-size="10pt" style:font-size-complex="10pt" fo:language="en" style:language-complex="ar" fo:country="US" style:country-complex="SA"/>
    </style:style>
    <style:style style:family="text" style:name="T590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91">
      <style:text-properties fo:color="#000000" fo:font-family="Gadugi" style:font-family-complex="Gadugi" fo:font-size="10pt" style:font-size-complex="10pt" fo:language="en" style:language-complex="ar" fo:country="US" style:country-complex="SA"/>
    </style:style>
    <style:style style:family="text" style:name="T592">
      <style:text-properties fo:color="#000000" fo:font-family="Gadugi" style:font-family-complex="Gadugi" fo:font-size="10pt" style:font-size-complex="10pt" fo:language="en" style:language-complex="ar" fo:country="US" style:country-complex="SA" style:text-underline-type="single" style:text-underline-style="solid" style:text-underline-width="auto" style:text-underline-color="font-color" fo:font-weight="bold"/>
    </style:style>
    <style:style style:family="text" style:name="T593">
      <style:text-properties fo:color="#000000" fo:font-family="Gadugi" style:font-family-complex="Gadugi" fo:font-size="10pt" style:font-size-complex="10pt" fo:language="en" style:language-complex="ar" fo:country="US" style:country-complex="SA"/>
    </style:style>
    <style:style style:family="text" style:name="T594">
      <style:text-properties fo:color="#000000" fo:font-family="Gadugi" style:font-family-complex="Gadugi" fo:font-size="10pt" style:font-size-complex="10pt" fo:language="en" style:language-complex="ar" fo:country="US" style:country-complex="SA" style:text-underline-type="single" style:text-underline-style="solid" style:text-underline-width="auto" style:text-underline-color="font-color" fo:font-weight="bold"/>
    </style:style>
    <style:style style:family="text" style:name="T595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96">
      <style:text-properties fo:color="#000000" fo:font-family="Gadugi" style:font-family-complex="Gadugi" fo:font-size="10pt" style:font-size-complex="10pt" fo:language="en" style:language-complex="ar" fo:country="US" style:country-complex="SA"/>
    </style:style>
    <style:style style:family="text" style:name="T597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98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599">
      <style:text-properties fo:color="#000000" fo:font-family="Gadugi" style:font-family-complex="Gadugi" fo:font-size="10pt" style:font-size-complex="10pt" fo:language="en" style:language-complex="ar" fo:country="US" style:country-complex="SA"/>
    </style:style>
    <style:style style:family="text" style:name="T600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01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898" style:family="paragraph" style:name="P81">
      <style:paragraph-properties fo:line-height="150%" fo:text-align="justify" fo:margin-left="0cm" fo:margin-right="0cm" fo:text-indent="1.997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02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03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04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904" style:family="paragraph" style:name="P82">
      <style:paragraph-properties fo:line-height="150%" fo:text-align="center" fo:margin-top="0pt" fo:margin-bottom="0.05pt"/>
      <style:text-properties fo:color="#000000" fo:font-family="Lucida Sans" style:font-family-complex="Lucida Sans" fo:font-size="13pt" style:font-size-complex="13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parent-style-name="929" style:family="text" style:name="T605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family="text" style:name="T606">
      <style:text-properties fo:color="#000000" fo:font-family="Gadugi" style:font-family-complex="Gadugi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family="text" style:name="T607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family="text" style:name="T608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parent-style-name="904" style:family="paragraph" style:name="P83">
      <style:paragraph-properties fo:line-height="150%" fo:text-align="justify" fo:margin-top="0pt" fo:margin-bottom="0.05pt"/>
      <style:text-properties fo:color="#000000" fo:font-family="Lucida Sans" style:font-family-complex="Lucida Sans" fo:font-size="13pt" style:font-size-complex="13pt" fo:language="pt" style:language-complex="ar" fo:country="PT" style:country-complex="SA" style:text-underline-type="single" style:text-underline-style="solid" style:text-underline-width="auto" style:text-underline-color="font-color"/>
    </style:style>
    <style:style style:parent-style-name="929" style:family="text" style:name="T609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/>
    </style:style>
    <style:style style:family="text" style:name="T610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/>
    </style:style>
    <style:style style:family="text" style:name="T611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/>
    </style:style>
    <style:style style:parent-style-name="898" style:family="paragraph" style:name="P84">
      <style:paragraph-properties fo:line-height="150%" fo:text-align="justify" fo:margin-left="0cm" fo:margin-right="0cm" fo:text-indent="1.997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12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13">
      <style:text-properties fo:color="#000000" fo:font-family="Gadugi" style:font-family-complex="Gadugi" fo:font-size="10pt" style:font-size-complex="10pt" fo:language="en" style:language-complex="ar" fo:country="US" style:country-complex="SA"/>
    </style:style>
    <style:style style:family="text" style:name="T614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15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16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898" style:family="paragraph" style:name="P85">
      <style:paragraph-properties fo:line-height="150%" fo:text-align="justify" fo:margin-left="0cm" fo:margin-right="0cm" fo:text-indent="1.997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17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18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19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898" style:family="paragraph" style:name="P86">
      <style:paragraph-properties fo:line-height="150%" fo:text-align="justify" fo:margin-left="0cm" fo:margin-right="0cm" fo:text-indent="1.997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20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21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22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23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24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25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898" style:family="paragraph" style:name="P87">
      <style:paragraph-properties fo:line-height="150%" fo:text-align="justify" fo:margin-left="0cm" fo:margin-right="0cm" fo:text-indent="1.997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26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27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28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898" style:family="paragraph" style:name="P88">
      <style:paragraph-properties fo:line-height="150%" fo:text-align="justify" fo:margin-left="0cm" fo:margin-right="0cm" fo:text-indent="1.997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29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30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31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898" style:family="paragraph" style:name="P89">
      <style:paragraph-properties fo:line-height="150%" fo:text-align="justify" fo:margin-left="0cm" fo:margin-right="0cm" fo:text-indent="1.997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32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33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34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898" style:family="paragraph" style:name="P90">
      <style:paragraph-properties fo:line-height="150%" fo:text-align="justify" fo:margin-left="0cm" fo:margin-right="0cm" fo:text-indent="1.997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35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36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37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38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898" style:family="paragraph" style:name="P91">
      <style:paragraph-properties fo:line-height="150%" fo:text-align="justify" fo:margin-left="0cm" fo:margin-right="0cm" fo:text-indent="1.997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39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40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41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898" style:family="paragraph" style:name="P92">
      <style:paragraph-properties fo:line-height="150%" fo:text-align="justify" fo:margin-left="0cm" fo:margin-right="0cm" fo:text-indent="1.997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42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43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44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45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898" style:family="paragraph" style:name="P93">
      <style:paragraph-properties fo:line-height="150%" fo:text-align="justify" fo:margin-left="0cm" fo:margin-right="0cm" fo:text-indent="1.997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46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47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48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898" style:family="paragraph" style:name="P94">
      <style:paragraph-properties fo:line-height="150%" fo:text-align="justify" fo:margin-left="0cm" fo:margin-right="0cm" fo:text-indent="1.997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49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50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51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898" style:family="paragraph" style:name="P95">
      <style:paragraph-properties fo:line-height="150%" fo:text-align="justify" fo:margin-left="0cm" fo:margin-right="0cm" fo:text-indent="1.997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52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53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54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898" style:family="paragraph" style:name="P96">
      <style:paragraph-properties fo:line-height="150%" fo:text-align="justify" fo:margin-left="0cm" fo:margin-right="0cm" fo:text-indent="1.997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55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56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57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58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59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904" style:family="paragraph" style:name="P97">
      <style:paragraph-properties fo:line-height="150%" fo:text-align="center" fo:margin-top="0pt" fo:margin-bottom="0.05pt"/>
      <style:text-properties fo:color="#000000" fo:font-family="Lucida Sans" style:font-family-complex="Lucida Sans" fo:font-size="13pt" style:font-size-complex="13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family="text" style:name="T660">
      <style:text-properties fo:color="#000000" fo:font-family="Gadugi" style:font-family-complex="Gadugi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family="text" style:name="T661">
      <style:text-properties fo:color="#000000" fo:font-family="Gadugi" style:font-family-complex="Gadugi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family="text" style:name="T662">
      <style:text-properties fo:color="#000000" fo:font-family="Gadugi" style:font-family-complex="Gadugi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parent-style-name="904" style:family="paragraph" style:name="P98">
      <style:paragraph-properties fo:line-height="150%" fo:text-align="center" fo:margin-top="0pt" fo:margin-bottom="0.05pt"/>
      <style:text-properties fo:color="#000000" fo:font-family="Lucida Sans" style:font-family-complex="Lucida Sans" fo:font-size="13pt" style:font-size-complex="13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parent-style-name="929" style:family="text" style:name="T663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family="text" style:name="T664">
      <style:text-properties fo:color="#000000" fo:font-family="Gadugi" style:font-family-complex="Gadugi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family="text" style:name="T665">
      <style:text-properties fo:color="#000000" fo:font-family="Gadugi" style:font-family-complex="Gadugi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family="text" style:name="T666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family="text" style:name="T667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parent-style-name="904" style:family="paragraph" style:name="P99">
      <style:paragraph-properties fo:line-height="150%" fo:text-align="center" fo:margin-top="0pt" fo:margin-bottom="0.05pt"/>
      <style:text-properties fo:color="#000000" fo:font-family="Lucida Sans" style:font-family-complex="Lucida Sans" fo:font-size="13pt" style:font-size-complex="13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family="text" style:name="T668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family="text" style:name="T669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family="text" style:name="T670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parent-style-name="898" style:family="paragraph" style:name="P100">
      <style:paragraph-properties fo:line-height="150%" fo:text-align="justify" fo:margin-left="0cm" fo:margin-right="0cm" fo:text-indent="1.997cm" fo:margin-top="0pt" fo:margin-bottom="0.05pt" fo:border="none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71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72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73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898" style:family="paragraph" style:name="P101">
      <style:paragraph-properties fo:line-height="150%" fo:text-align="justify" fo:margin-left="0cm" fo:margin-right="0cm" fo:text-indent="1.997cm" fo:margin-top="0pt" fo:margin-bottom="0.05pt" fo:border="none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74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75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76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898" style:family="paragraph" style:name="P102">
      <style:paragraph-properties fo:line-height="150%" fo:text-align="justify" fo:margin-left="0cm" fo:margin-right="0cm" fo:text-indent="1.997cm" fo:margin-top="0pt" fo:margin-bottom="0.05pt" fo:border="none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677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78">
      <style:text-properties fo:color="#000000" fo:font-family="Gadugi" style:font-family-complex="Gadugi" fo:font-size="10pt" style:font-size-complex="10pt" fo:language="en" style:language-complex="ar" fo:country="US" style:country-complex="SA"/>
    </style:style>
    <style:style style:family="text" style:name="T679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80">
      <style:text-properties fo:color="#000000" fo:font-family="Gadugi" style:font-family-complex="Gadugi" fo:font-size="10pt" style:font-size-complex="10pt" fo:language="en" style:language-complex="ar" fo:country="US" style:country-complex="SA"/>
    </style:style>
    <style:style style:family="text" style:name="T681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82">
      <style:text-properties fo:color="#000000" fo:font-family="Gadugi" style:font-family-complex="Gadugi" fo:font-size="10pt" style:font-size-complex="10pt" fo:language="pt" style:language-complex="ar" fo:country="PT" style:country-complex="SA" fo:font-style="italic" style:text-underline-type="single" style:text-underline-style="solid" style:text-underline-width="auto" style:text-underline-color="font-color" fo:font-weight="bold"/>
    </style:style>
    <style:style style:family="text" style:name="T683">
      <style:text-properties fo:color="#000000" fo:font-family="Gadugi" style:font-family-complex="Gadugi" fo:font-size="10pt" style:font-size-complex="10pt" fo:language="pt" style:language-complex="ar" fo:country="PT" style:country-complex="SA" fo:font-style="italic" style:text-underline-type="single" style:text-underline-style="solid" style:text-underline-width="auto" style:text-underline-color="font-color" fo:font-weight="bold"/>
    </style:style>
    <style:style style:family="text" style:name="T684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85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86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87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688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paragraph" style:name="P103">
      <style:paragraph-properties fo:line-height="150%" fo:text-align="center" fo:margin-top="15pt" fo:margin-bottom="10pt"/>
      <style:text-properties fo:font-family="Gadugi" style:font-family-complex="Gadugi" fo:font-size="10pt" style:font-size-complex="10pt" fo:font-weight="bold"/>
    </style:style>
    <style:style style:family="text" style:name="T689">
      <style:text-properties fo:font-family="Gadugi" style:font-family-complex="Gadugi" fo:font-size="10pt" style:font-size-complex="10pt" fo:font-weight="bold"/>
    </style:style>
    <style:style style:family="text" style:name="T690">
      <style:text-properties fo:font-family="Gadugi" style:font-family-complex="Gadugi" fo:font-size="10pt" style:font-size-complex="10pt" fo:font-weight="bold"/>
    </style:style>
    <style:style style:family="text" style:name="T691">
      <style:text-properties fo:font-family="Gadugi" style:font-family-complex="Gadugi" fo:font-size="10pt" style:font-size-complex="10pt" fo:font-weight="bold"/>
    </style:style>
    <style:style style:family="paragraph" style:name="P104">
      <style:paragraph-properties fo:line-height="150%" fo:text-align="center" fo:margin-top="15pt" fo:margin-bottom="10pt"/>
      <style:text-properties fo:font-family="Gadugi" style:font-family-complex="Gadugi" fo:font-size="10pt" style:font-size-complex="10pt" fo:font-weight="bold"/>
    </style:style>
    <style:style style:family="text" style:name="T692">
      <style:text-properties fo:font-family="Gadugi" style:font-family-complex="Gadugi" fo:font-size="10pt" style:font-size-complex="10pt" fo:font-weight="bold"/>
    </style:style>
    <style:style style:family="text" style:name="T693">
      <style:text-properties fo:font-family="Gadugi" style:font-family-complex="Gadugi" fo:font-size="8pt" style:font-size-complex="8pt" fo:font-weight="bold"/>
    </style:style>
    <style:style style:family="text" style:name="T694">
      <style:text-properties fo:font-family="Gadugi" style:font-family-complex="Gadugi" fo:font-size="10pt" style:font-size-complex="10pt" fo:font-weight="bold"/>
    </style:style>
    <style:style style:family="paragraph" style:name="P105">
      <style:paragraph-properties fo:line-height="150%" fo:text-align="center" fo:margin-top="15pt" fo:margin-bottom="10pt"/>
      <style:text-properties fo:font-family="Gadugi" style:font-family-complex="Gadugi" fo:font-size="8pt" style:font-size-complex="8pt"/>
    </style:style>
    <style:style style:family="text" style:name="T695">
      <style:text-properties fo:font-family="Gadugi" style:font-family-complex="Gadugi" fo:font-size="10pt" style:font-size-complex="10pt" fo:font-weight="bold"/>
    </style:style>
    <style:style style:family="text" style:name="T696">
      <style:text-properties fo:font-family="Gadugi" style:font-family-complex="Gadugi" fo:font-size="8pt" style:font-size-complex="8pt"/>
    </style:style>
    <style:style style:family="text" style:name="T697">
      <style:text-properties fo:font-family="Gadugi" style:font-family-complex="Gadugi" fo:font-size="8pt" style:font-size-complex="8pt"/>
    </style:style>
    <style:style style:family="paragraph" style:name="P106">
      <style:paragraph-properties fo:line-height="150%" fo:text-align="justify" fo:margin-left="0cm" fo:margin-right="0cm" fo:text-indent="1.999cm" fo:margin-top="12pt" fo:margin-bottom="10pt"/>
      <style:text-properties fo:font-family="Gadugi" style:font-family-complex="Gadugi" fo:font-size="10pt" style:font-size-complex="10pt"/>
    </style:style>
    <style:style style:family="text" style:name="T698">
      <style:text-properties fo:font-family="Gadugi" style:font-family-complex="Gadugi" fo:font-size="10pt" style:font-size-complex="10pt"/>
    </style:style>
    <style:style style:family="text" style:name="T699">
      <style:text-properties fo:font-family="Gadugi" style:font-family-complex="Gadugi" fo:font-size="8pt" style:font-size-complex="8pt"/>
    </style:style>
    <style:style style:family="text" style:name="T700">
      <style:text-properties fo:font-family="Gadugi" style:font-family-complex="Gadugi" fo:font-size="10pt" style:font-size-complex="10pt"/>
    </style:style>
    <style:style style:family="paragraph" style:name="P107">
      <style:paragraph-properties fo:line-height="150%" fo:text-align="justify" fo:margin-left="0cm" fo:margin-right="0cm" fo:text-indent="1.999cm" fo:margin-top="12pt" fo:margin-bottom="10pt"/>
      <style:text-properties fo:font-family="Gadugi" style:font-family-complex="Gadugi" fo:font-size="8pt" style:font-size-complex="8pt"/>
    </style:style>
    <style:style style:family="text" style:name="T701">
      <style:text-properties fo:font-family="Gadugi" style:font-family-complex="Gadugi" fo:font-size="10pt" style:font-size-complex="10pt"/>
    </style:style>
    <style:style style:family="text" style:name="T702">
      <style:text-properties fo:font-family="Gadugi" style:font-family-complex="Gadugi" fo:font-size="10pt" style:font-size-complex="10pt" fo:font-weight="normal"/>
    </style:style>
    <style:style style:family="text" style:name="T703">
      <style:text-properties fo:font-family="Gadugi" style:font-family-complex="Gadugi" fo:font-size="10pt" style:font-size-complex="10pt"/>
    </style:style>
    <style:style style:family="text" style:name="T704">
      <style:text-properties fo:font-family="Gadugi" style:font-family-complex="Gadugi" fo:font-size="8pt" style:font-size-complex="8pt"/>
    </style:style>
    <style:style style:family="text" style:name="T705">
      <style:text-properties fo:font-family="Gadugi" style:font-family-complex="Gadugi" fo:font-size="8pt" style:font-size-complex="8pt"/>
    </style:style>
    <style:style style:family="paragraph" style:name="P108">
      <style:paragraph-properties fo:line-height="150%" fo:text-align="justify" fo:margin-left="0cm" fo:margin-right="0cm" fo:text-indent="1.999cm" fo:margin-top="12pt" fo:margin-bottom="10pt"/>
      <style:text-properties fo:font-family="Gadugi" style:font-family-complex="Gadugi" fo:font-size="10pt" style:font-size-complex="10pt"/>
    </style:style>
    <style:style style:family="text" style:name="T706">
      <style:text-properties fo:font-family="Gadugi" style:font-family-complex="Gadugi" fo:font-size="10pt" style:font-size-complex="10pt"/>
    </style:style>
    <style:style style:family="text" style:name="T707">
      <style:text-properties fo:font-family="Gadugi" style:font-family-complex="Gadugi" fo:font-size="10pt" style:font-size-complex="10pt" fo:font-weight="normal"/>
    </style:style>
    <style:style style:family="text" style:name="T708">
      <style:text-properties fo:font-family="Gadugi" style:font-family-complex="Gadugi" fo:font-size="10pt" style:font-size-complex="10pt" fo:font-weight="normal"/>
    </style:style>
    <style:style style:family="text" style:name="T709">
      <style:text-properties fo:font-family="Gadugi" style:font-family-complex="Gadugi" fo:font-size="10pt" style:font-size-complex="10pt"/>
    </style:style>
    <style:style style:family="text" style:name="T710">
      <style:text-properties fo:font-family="Gadugi" style:font-family-complex="Gadugi" fo:font-size="10pt" style:font-size-complex="10pt"/>
    </style:style>
    <style:style style:family="text" style:name="T711">
      <style:text-properties fo:font-family="Gadugi" style:font-family-complex="Gadugi" fo:font-size="8pt" style:font-size-complex="8pt"/>
    </style:style>
    <style:style style:family="text" style:name="T712">
      <style:text-properties fo:font-family="Gadugi" style:font-family-complex="Gadugi" fo:font-size="10pt" style:font-size-complex="10pt"/>
    </style:style>
    <style:style style:family="paragraph" style:name="P109">
      <style:paragraph-properties fo:line-height="150%" fo:text-align="justify" fo:margin-left="0cm" fo:margin-right="0cm" fo:text-indent="1.999cm" fo:margin-top="12pt" fo:margin-bottom="10pt"/>
      <style:text-properties fo:font-family="Gadugi" style:font-family-complex="Gadugi" fo:font-size="10pt" style:font-size-complex="10pt"/>
    </style:style>
    <style:style style:family="text" style:name="T713">
      <style:text-properties fo:font-family="Gadugi" style:font-family-complex="Gadugi" fo:font-size="10pt" style:font-size-complex="10pt"/>
    </style:style>
    <style:style style:family="text" style:name="T714">
      <style:text-properties fo:font-family="Gadugi" style:font-family-complex="Gadugi" fo:font-size="8pt" style:font-size-complex="8pt"/>
    </style:style>
    <style:style style:family="text" style:name="T715">
      <style:text-properties fo:font-family="Gadugi" style:font-family-complex="Gadugi" fo:font-size="8pt" style:font-size-complex="8pt"/>
    </style:style>
    <style:style style:family="text" style:name="T716">
      <style:text-properties fo:font-family="Gadugi" style:font-family-complex="Gadugi" fo:font-size="10pt" style:font-size-complex="10pt"/>
    </style:style>
    <style:style style:family="text" style:name="T717">
      <style:text-properties fo:font-family="Gadugi" style:font-family-complex="Gadugi" fo:font-size="10pt" style:font-size-complex="10pt" fo:font-weight="normal"/>
    </style:style>
    <style:style style:family="text" style:name="T718">
      <style:text-properties fo:font-family="Gadugi" style:font-family-complex="Gadugi" fo:font-size="10pt" style:font-size-complex="10pt"/>
    </style:style>
    <style:style style:family="text" style:name="T719">
      <style:text-properties fo:font-family="Gadugi" style:font-family-complex="Gadugi" fo:font-size="8pt" style:font-size-complex="8pt"/>
    </style:style>
    <style:style style:family="text" style:name="T720">
      <style:text-properties fo:font-family="Gadugi" style:font-family-complex="Gadugi" fo:font-size="10pt" style:font-size-complex="10pt"/>
    </style:style>
    <style:style style:family="text" style:name="T721">
      <style:text-properties fo:font-family="Gadugi" style:font-family-complex="Gadugi" fo:font-size="8pt" style:font-size-complex="8pt"/>
    </style:style>
    <style:style style:family="paragraph" style:name="P110">
      <style:paragraph-properties fo:line-height="100%" fo:text-align="justify" fo:margin-left="0cm" fo:margin-right="0cm" fo:text-indent="1.999cm" fo:margin-top="0pt"/>
      <style:text-properties fo:font-family="Gadugi" style:font-family-complex="Gadugi" fo:font-size="8pt" style:font-size-complex="8pt"/>
    </style:style>
    <style:style style:family="text" style:name="T722">
      <style:text-properties fo:font-family="Gadugi" style:font-family-complex="Gadugi" fo:font-size="10pt" style:font-size-complex="10pt"/>
    </style:style>
    <style:style style:family="text" style:name="T723">
      <style:text-properties fo:font-family="Gadugi" style:font-family-complex="Gadugi" fo:font-size="10pt" style:font-size-complex="10pt"/>
    </style:style>
    <style:style style:family="text" style:name="T724">
      <style:text-properties fo:font-family="Gadugi" style:font-family-complex="Gadugi" fo:font-size="10pt" style:font-size-complex="10pt"/>
    </style:style>
    <style:style style:family="paragraph" style:name="P111">
      <style:paragraph-properties fo:line-height="150%" fo:text-align="justify" fo:margin-left="2cm" fo:margin-right="0cm" fo:text-indent="0cm" fo:margin-top="0pt" fo:margin-bottom="10pt"/>
      <style:text-properties fo:font-family="Gadugi" style:font-family-complex="Gadugi" fo:font-size="10pt" style:font-size-complex="10pt"/>
    </style:style>
    <style:style style:family="text" style:name="T725">
      <style:text-properties fo:font-family="Gadugi" style:font-family-complex="Gadugi" fo:font-size="10pt" style:font-size-complex="10pt"/>
    </style:style>
    <style:style style:family="text" style:name="T726">
      <style:text-properties fo:font-family="Gadugi" style:font-family-complex="Gadugi" fo:font-size="8pt" style:font-size-complex="8pt"/>
    </style:style>
    <style:style style:family="text" style:name="T727">
      <style:text-properties fo:font-family="Gadugi" style:font-family-complex="Gadugi" fo:font-size="10pt" style:font-size-complex="10pt"/>
    </style:style>
    <style:style style:family="paragraph" style:name="P112">
      <style:paragraph-properties fo:line-height="150%" fo:text-align="justify" fo:margin-left="2cm" fo:margin-right="0cm" fo:text-indent="0cm" fo:margin-top="0pt" fo:margin-bottom="10pt"/>
      <style:text-properties fo:font-family="Gadugi" style:font-family-complex="Gadugi" fo:font-size="8pt" style:font-size-complex="8pt"/>
    </style:style>
    <style:style style:family="text" style:name="T728">
      <style:text-properties fo:font-family="Gadugi" style:font-family-complex="Gadugi" fo:font-size="10pt" style:font-size-complex="10pt"/>
    </style:style>
    <style:style style:family="text" style:name="T729">
      <style:text-properties fo:font-family="Gadugi" style:font-family-complex="Gadugi" fo:font-size="8pt" style:font-size-complex="8pt"/>
    </style:style>
    <style:style style:family="text" style:name="T730">
      <style:text-properties fo:font-family="Gadugi" style:font-family-complex="Gadugi" fo:font-size="8pt" style:font-size-complex="8pt"/>
    </style:style>
    <style:style style:family="paragraph" style:name="P113">
      <style:paragraph-properties fo:line-height="100%" fo:text-align="center" fo:margin-bottom="10pt"/>
      <style:text-properties fo:font-family="Gadugi" style:font-family-complex="Gadugi" fo:font-size="10pt" style:font-size-complex="10pt" fo:font-weight="bold"/>
    </style:style>
    <style:style style:family="text" style:name="T731">
      <style:text-properties fo:font-family="Gadugi" style:font-family-complex="Gadugi" fo:font-size="10pt" style:font-size-complex="10pt" fo:font-weight="bold"/>
    </style:style>
    <style:style style:family="text" style:name="T732">
      <style:text-properties fo:font-family="Gadugi" style:font-family-complex="Gadugi" fo:font-size="10pt" style:font-size-complex="10pt" fo:font-weight="bold"/>
    </style:style>
    <style:style style:family="text" style:name="T733">
      <style:text-properties fo:font-family="Gadugi" style:font-family-complex="Gadugi" fo:font-size="10pt" style:font-size-complex="10pt" fo:font-weight="bold"/>
    </style:style>
    <style:style style:family="paragraph" style:name="P114">
      <style:paragraph-properties fo:line-height="150%" fo:text-align="center" fo:margin-top="15pt" fo:margin-bottom="10pt"/>
      <style:text-properties fo:font-family="Gadugi" style:font-family-complex="Gadugi" fo:font-size="10pt" style:font-size-complex="10pt" fo:font-weight="bold"/>
    </style:style>
    <style:style style:family="text" style:name="T734">
      <style:text-properties fo:font-family="Gadugi" style:font-family-complex="Gadugi" fo:font-size="10pt" style:font-size-complex="10pt" fo:font-weight="bold"/>
    </style:style>
    <style:style style:family="text" style:name="T735">
      <style:text-properties fo:font-family="Gadugi" style:font-family-complex="Gadugi" fo:font-size="8pt" style:font-size-complex="8pt"/>
    </style:style>
    <style:style style:family="text" style:name="T736">
      <style:text-properties fo:font-family="Gadugi" style:font-family-complex="Gadugi" fo:font-size="8pt" style:font-size-complex="8pt"/>
    </style:style>
    <style:style style:family="paragraph" style:name="P115">
      <style:paragraph-properties fo:line-height="100%" fo:text-align="justify" fo:margin-left="0cm" fo:margin-right="0cm" fo:text-indent="1.999cm" fo:margin-top="0pt" fo:margin-bottom="10pt"/>
      <style:text-properties fo:font-family="Gadugi" style:font-family-complex="Gadugi" fo:font-size="10pt" style:font-size-complex="10pt"/>
    </style:style>
    <style:style style:family="text" style:name="T737">
      <style:text-properties fo:font-family="Gadugi" style:font-family-complex="Gadugi" fo:font-size="10pt" style:font-size-complex="10pt"/>
    </style:style>
    <style:style style:family="text" style:name="T738">
      <style:text-properties fo:font-family="Gadugi" style:font-family-complex="Gadugi" fo:font-size="10pt" style:font-size-complex="10pt"/>
    </style:style>
    <style:style style:family="text" style:name="T739">
      <style:text-properties fo:font-family="Gadugi" style:font-family-complex="Gadugi" fo:font-size="10pt" style:font-size-complex="10pt"/>
    </style:style>
    <style:style style:family="paragraph" style:name="P116">
      <style:paragraph-properties fo:line-height="150%" fo:text-align="justify" fo:margin-left="0cm" fo:margin-right="0cm" fo:text-indent="1.999cm" fo:margin-top="0pt" fo:margin-bottom="10pt"/>
      <style:text-properties fo:font-family="Gadugi" style:font-family-complex="Gadugi" fo:font-size="10pt" style:font-size-complex="10pt"/>
    </style:style>
    <style:style style:family="text" style:name="T740">
      <style:text-properties fo:font-family="Gadugi" style:font-family-complex="Gadugi" fo:font-size="10pt" style:font-size-complex="10pt"/>
    </style:style>
    <style:style style:family="text" style:name="T741">
      <style:text-properties fo:font-family="Gadugi" style:font-family-complex="Gadugi" fo:font-size="8pt" style:font-size-complex="8pt"/>
    </style:style>
    <style:style style:family="text" style:name="T742">
      <style:text-properties fo:font-family="Gadugi" style:font-family-complex="Gadugi" fo:font-size="10pt" style:font-size-complex="10pt"/>
    </style:style>
    <style:style style:family="paragraph" style:name="P117">
      <style:paragraph-properties fo:line-height="150%" fo:text-align="justify" fo:margin-left="0cm" fo:margin-right="0cm" fo:text-indent="1.999cm" fo:margin-top="0pt" fo:margin-bottom="10pt"/>
      <style:text-properties fo:font-family="Gadugi" style:font-family-complex="Gadugi" fo:font-size="8pt" style:font-size-complex="8pt"/>
    </style:style>
    <style:style style:family="text" style:name="T743">
      <style:text-properties fo:font-family="Gadugi" style:font-family-complex="Gadugi" fo:font-size="10pt" style:font-size-complex="10pt"/>
    </style:style>
    <style:style style:family="text" style:name="T744">
      <style:text-properties fo:color="#ff0000" fo:font-family="Gadugi" style:font-family-complex="Gadugi" fo:font-size="10pt" style:font-size-complex="10pt" style:text-underline-type="single" style:text-underline-style="solid" style:text-underline-width="auto" style:text-underline-color="font-color" fo:font-weight="bold" fo:background-color="#ffff00"/>
    </style:style>
    <style:style style:family="text" style:name="T745">
      <style:text-properties fo:font-family="Gadugi" style:font-family-complex="Gadugi" fo:font-size="10pt" style:font-size-complex="10pt"/>
    </style:style>
    <style:style style:family="text" style:name="T746">
      <style:text-properties fo:font-family="Gadugi" style:font-family-complex="Gadugi" fo:font-size="10pt" style:font-size-complex="10pt" style:text-underline-type="single" style:text-underline-style="solid" style:text-underline-width="auto" style:text-underline-color="font-color" fo:font-weight="bold"/>
    </style:style>
    <style:style style:family="text" style:name="T747">
      <style:text-properties fo:font-family="Gadugi" style:font-family-complex="Gadugi" fo:font-size="10pt" style:font-size-complex="10pt"/>
    </style:style>
    <style:style style:family="text" style:name="T748">
      <style:text-properties fo:font-family="Gadugi" style:font-family-complex="Gadugi" fo:font-size="8pt" style:font-size-complex="8pt"/>
    </style:style>
    <style:style style:family="text" style:name="T749">
      <style:text-properties fo:font-family="Gadugi" style:font-family-complex="Gadugi" fo:font-size="8pt" style:font-size-complex="8pt"/>
    </style:style>
    <style:style style:family="paragraph" style:name="P118">
      <style:paragraph-properties fo:line-height="100%" fo:text-align="justify" fo:margin-left="0cm" fo:margin-right="0cm" fo:text-indent="1.999cm" fo:margin-top="0pt" fo:margin-bottom="10pt"/>
      <style:text-properties fo:font-family="Gadugi" style:font-family-complex="Gadugi" fo:font-size="8pt" style:font-size-complex="8pt"/>
    </style:style>
    <style:style style:family="text" style:name="T750">
      <style:text-properties fo:font-family="Gadugi" style:font-family-complex="Gadugi" fo:font-size="8pt" style:font-size-complex="8pt"/>
    </style:style>
    <style:style style:family="text" style:name="T751">
      <style:text-properties fo:font-family="Gadugi" style:font-family-complex="Gadugi" fo:font-size="8pt" style:font-size-complex="8pt"/>
    </style:style>
    <style:style style:family="text" style:name="T752">
      <style:text-properties fo:font-family="Gadugi" style:font-family-complex="Gadugi" fo:font-size="8pt" style:font-size-complex="8pt"/>
    </style:style>
    <style:style style:family="paragraph" style:name="P119">
      <style:paragraph-properties fo:line-height="150%" fo:text-align="justify" fo:margin-left="0cm" fo:margin-right="0cm" fo:text-indent="1.999cm" fo:margin-top="0pt" fo:margin-bottom="10pt"/>
      <style:text-properties fo:font-family="Gadugi" style:font-family-complex="Gadugi" fo:font-size="8pt" style:font-size-complex="8pt"/>
    </style:style>
    <style:style style:family="text" style:name="T753">
      <style:text-properties fo:font-family="Gadugi" style:font-family-complex="Gadugi" fo:font-size="10pt" style:font-size-complex="10pt"/>
    </style:style>
    <style:style style:family="text" style:name="T754">
      <style:text-properties fo:font-family="Gadugi" style:font-family-complex="Gadugi" fo:font-size="10pt" style:font-size-complex="10pt" fo:font-weight="bold" fo:background-color="#ffff00"/>
    </style:style>
    <style:style style:family="text" style:name="T755">
      <style:text-properties fo:font-family="Gadugi" style:font-family-complex="Gadugi" fo:font-size="10pt" style:font-size-complex="10pt"/>
    </style:style>
    <style:style style:family="text" style:name="T756">
      <style:text-properties fo:font-family="Gadugi" style:font-family-complex="Gadugi" fo:font-size="8pt" style:font-size-complex="8pt"/>
    </style:style>
    <style:style style:family="text" style:name="T757">
      <style:text-properties fo:font-family="Gadugi" style:font-family-complex="Gadugi" fo:font-size="10pt" style:font-size-complex="10pt"/>
    </style:style>
    <style:style style:family="paragraph" style:name="P120">
      <style:paragraph-properties fo:line-height="100%" fo:text-align="justify" fo:margin-left="0cm" fo:margin-right="0cm" fo:text-indent="1.999cm" fo:margin-top="0pt"/>
      <style:text-properties fo:font-family="Gadugi" style:font-family-complex="Gadugi" fo:font-size="10pt" style:font-size-complex="10pt"/>
    </style:style>
    <style:style style:family="text" style:name="T758">
      <style:text-properties fo:font-family="Gadugi" style:font-family-complex="Gadugi" fo:font-size="8pt" style:font-size-complex="8pt"/>
    </style:style>
    <style:style style:family="text" style:name="T759">
      <style:text-properties fo:font-family="Gadugi" style:font-family-complex="Gadugi" fo:font-size="8pt" style:font-size-complex="8pt"/>
    </style:style>
    <style:style style:family="text" style:name="T760">
      <style:text-properties fo:font-family="Gadugi" style:font-family-complex="Gadugi" fo:font-size="8pt" style:font-size-complex="8pt"/>
    </style:style>
    <style:style style:family="paragraph" style:name="P121">
      <style:paragraph-properties fo:line-height="150%" fo:text-align="justify" fo:margin-left="0cm" fo:margin-right="0cm" fo:text-indent="1.999cm" fo:margin-top="0pt" fo:margin-bottom="10pt"/>
      <style:text-properties fo:font-family="Gadugi" style:font-family-complex="Gadugi" fo:font-size="8pt" style:font-size-complex="8pt"/>
    </style:style>
    <style:style style:family="text" style:name="T761">
      <style:text-properties fo:font-family="Gadugi" style:font-family-complex="Gadugi" fo:font-size="10pt" style:font-size-complex="10pt"/>
    </style:style>
    <style:style style:family="text" style:name="T762">
      <style:text-properties fo:font-family="Gadugi" style:font-family-complex="Gadugi" fo:font-size="8pt" style:font-size-complex="8pt"/>
    </style:style>
    <style:style style:family="text" style:name="T763">
      <style:text-properties fo:font-family="Gadugi" style:font-family-complex="Gadugi" fo:font-size="8pt" style:font-size-complex="8pt"/>
    </style:style>
    <style:style style:family="paragraph" style:name="P122">
      <style:paragraph-properties fo:line-height="100%" fo:text-align="justify" fo:margin-left="0cm" fo:margin-right="0cm" fo:text-indent="1.999cm" fo:margin-top="0pt" fo:margin-bottom="10pt"/>
      <style:text-properties fo:font-family="Gadugi" style:font-family-complex="Gadugi" fo:font-size="8pt" style:font-size-complex="8pt"/>
    </style:style>
    <style:style style:family="text" style:name="T764">
      <style:text-properties fo:font-family="Gadugi" style:font-family-complex="Gadugi" fo:font-size="8pt" style:font-size-complex="8pt"/>
    </style:style>
    <style:style style:family="text" style:name="T765">
      <style:text-properties fo:font-family="Gadugi" style:font-family-complex="Gadugi" fo:font-size="8pt" style:font-size-complex="8pt"/>
    </style:style>
    <style:style style:family="text" style:name="T766">
      <style:text-properties fo:font-family="Gadugi" style:font-family-complex="Gadugi" fo:font-size="8pt" style:font-size-complex="8pt"/>
    </style:style>
    <style:style style:family="paragraph" style:name="P123">
      <style:paragraph-properties fo:line-height="150%" fo:text-align="center" fo:margin-top="15pt" fo:margin-bottom="10pt"/>
      <style:text-properties fo:font-family="Gadugi" style:font-family-complex="Gadugi" fo:font-size="8pt" style:font-size-complex="8pt"/>
    </style:style>
    <style:style style:family="text" style:name="T767">
      <style:text-properties fo:font-family="Gadugi" style:font-family-complex="Gadugi" fo:font-size="10pt" style:font-size-complex="10pt" fo:font-weight="bold"/>
    </style:style>
    <style:style style:family="text" style:name="T768">
      <style:text-properties fo:font-family="Gadugi" style:font-family-complex="Gadugi" fo:font-size="8pt" style:font-size-complex="8pt"/>
    </style:style>
    <style:style style:family="text" style:name="T769">
      <style:text-properties fo:font-family="Gadugi" style:font-family-complex="Gadugi" fo:font-size="8pt" style:font-size-complex="8pt"/>
    </style:style>
    <style:style style:family="paragraph" style:name="P124">
      <style:paragraph-properties fo:line-height="100%" fo:text-align="center" fo:margin-bottom="10pt"/>
      <style:text-properties fo:font-family="Gadugi" style:font-family-complex="Gadugi" fo:font-size="8pt" style:font-size-complex="8pt"/>
    </style:style>
    <style:style style:family="text" style:name="T770">
      <style:text-properties fo:font-family="Gadugi" style:font-family-complex="Gadugi" fo:font-size="8pt" style:font-size-complex="8pt"/>
    </style:style>
    <style:style style:family="text" style:name="T771">
      <style:text-properties fo:font-family="Gadugi" style:font-family-complex="Gadugi" fo:font-size="8pt" style:font-size-complex="8pt"/>
    </style:style>
    <style:style style:family="text" style:name="T772">
      <style:text-properties fo:font-family="Gadugi" style:font-family-complex="Gadugi" fo:font-size="8pt" style:font-size-complex="8pt"/>
    </style:style>
    <style:style style:family="paragraph" style:name="P125">
      <style:paragraph-properties fo:line-height="150%" fo:text-align="center" fo:margin-top="15pt" fo:margin-bottom="10pt"/>
      <style:text-properties fo:font-family="Gadugi" style:font-family-complex="Gadugi" fo:font-size="8pt" style:font-size-complex="8pt"/>
    </style:style>
    <style:style style:family="text" style:name="T773">
      <style:text-properties fo:font-family="Gadugi" style:font-family-complex="Gadugi" fo:font-size="10pt" style:font-size-complex="10pt" fo:font-weight="bold"/>
    </style:style>
    <style:style style:family="text" style:name="T774">
      <style:text-properties fo:font-family="Gadugi" style:font-family-complex="Gadugi" fo:font-size="8pt" style:font-size-complex="8pt"/>
    </style:style>
    <style:style style:family="text" style:name="T775">
      <style:text-properties fo:font-family="Gadugi" style:font-family-complex="Gadugi" fo:font-size="8pt" style:font-size-complex="8pt"/>
    </style:style>
    <style:style style:family="paragraph" style:name="P126">
      <style:paragraph-properties fo:line-height="150%" fo:text-align="justify" fo:margin-left="0cm" fo:margin-right="0cm" fo:text-indent="1.999cm" fo:margin-top="12pt" fo:margin-bottom="10pt"/>
      <style:text-properties fo:font-family="Gadugi" style:font-family-complex="Gadugi" fo:font-size="10pt" style:font-size-complex="10pt"/>
    </style:style>
    <style:style style:family="text" style:name="T776">
      <style:text-properties fo:font-family="Gadugi" style:font-family-complex="Gadugi" fo:font-size="10pt" style:font-size-complex="10pt"/>
    </style:style>
    <style:style style:family="text" style:name="T777">
      <style:text-properties fo:font-family="Gadugi" style:font-family-complex="Gadugi" fo:font-size="10pt" style:font-size-complex="10pt"/>
    </style:style>
    <style:style style:family="text" style:name="T778">
      <style:text-properties fo:font-family="Gadugi" style:font-family-complex="Gadugi" fo:font-size="8pt" style:font-size-complex="8pt"/>
    </style:style>
    <style:style style:family="text" style:name="T779">
      <style:text-properties fo:font-family="Gadugi" style:font-family-complex="Gadugi" fo:font-size="10pt" style:font-size-complex="10pt"/>
    </style:style>
    <style:style style:family="paragraph" style:name="P127">
      <style:paragraph-properties fo:line-height="150%" fo:text-align="justify" fo:margin-left="0cm" fo:margin-right="0cm" fo:text-indent="1.999cm" fo:margin-top="12pt" fo:margin-bottom="10pt"/>
      <style:text-properties fo:font-family="Gadugi" style:font-family-complex="Gadugi" fo:font-size="8pt" style:font-size-complex="8pt"/>
    </style:style>
    <style:style style:family="text" style:name="T780">
      <style:text-properties fo:font-family="Gadugi" style:font-family-complex="Gadugi" fo:font-size="10pt" style:font-size-complex="10pt"/>
    </style:style>
    <style:style style:family="text" style:name="T781">
      <style:text-properties fo:font-family="Gadugi" style:font-family-complex="Gadugi" fo:font-size="10pt" style:font-size-complex="10pt" fo:font-style="italic"/>
    </style:style>
    <style:style style:family="text" style:name="T782">
      <style:text-properties fo:font-family="Gadugi" style:font-family-complex="Gadugi" fo:font-size="10pt" style:font-size-complex="10pt" fo:font-style="italic" style:text-underline-type="single" style:text-underline-style="solid" style:text-underline-width="auto" style:text-underline-color="font-color" fo:font-weight="bold"/>
    </style:style>
    <style:style style:family="text" style:name="T783">
      <style:text-properties fo:font-family="Gadugi" style:font-family-complex="Gadugi" fo:font-size="10pt" style:font-size-complex="10pt" fo:font-style="italic"/>
    </style:style>
    <style:style style:family="text" style:name="T784">
      <style:text-properties fo:font-family="Gadugi" style:font-family-complex="Gadugi" fo:font-size="10pt" style:font-size-complex="10pt"/>
    </style:style>
    <style:style style:family="text" style:name="T785">
      <style:text-properties fo:font-family="Gadugi" style:font-family-complex="Gadugi" fo:font-size="10pt" style:font-size-complex="10pt" fo:font-style="italic"/>
    </style:style>
    <style:style style:family="text" style:name="T786">
      <style:text-properties fo:font-family="Gadugi" style:font-family-complex="Gadugi" fo:font-size="10pt" style:font-size-complex="10pt" fo:font-style="italic" style:text-underline-type="single" style:text-underline-style="solid" style:text-underline-width="auto" style:text-underline-color="font-color" fo:font-weight="bold"/>
    </style:style>
    <style:style style:family="text" style:name="T787">
      <style:text-properties fo:font-family="Gadugi" style:font-family-complex="Gadugi" fo:font-size="10pt" style:font-size-complex="10pt" fo:font-style="italic"/>
    </style:style>
    <style:style style:family="text" style:name="T788">
      <style:text-properties fo:font-family="Gadugi" style:font-family-complex="Gadugi" fo:font-size="10pt" style:font-size-complex="10pt"/>
    </style:style>
    <style:style style:family="text" style:name="T789">
      <style:text-properties fo:font-family="Gadugi" style:font-family-complex="Gadugi" fo:font-size="8pt" style:font-size-complex="8pt"/>
    </style:style>
    <style:style style:family="text" style:name="T790">
      <style:text-properties fo:font-family="Gadugi" style:font-family-complex="Gadugi" fo:font-size="8pt" style:font-size-complex="8pt"/>
    </style:style>
    <style:style style:family="paragraph" style:name="P128">
      <style:paragraph-properties fo:line-height="150%" fo:text-align="justify" fo:margin-left="0cm" fo:margin-right="0cm" fo:text-indent="1.999cm" fo:margin-top="12pt" fo:margin-bottom="10pt"/>
      <style:text-properties fo:font-family="Gadugi" style:font-family-complex="Gadugi" fo:font-size="8pt" style:font-size-complex="8pt"/>
    </style:style>
    <style:style style:family="text" style:name="T791">
      <style:text-properties fo:font-family="Gadugi" style:font-family-complex="Gadugi" fo:font-size="10pt" style:font-size-complex="10pt"/>
    </style:style>
    <style:style style:family="text" style:name="T792">
      <style:text-properties fo:font-family="Gadugi" style:font-family-complex="Gadugi" fo:font-size="10pt" style:font-size-complex="10pt" fo:font-weight="normal"/>
    </style:style>
    <style:style style:family="text" style:name="T793">
      <style:text-properties fo:font-family="Gadugi" style:font-family-complex="Gadugi" fo:font-size="10pt" style:font-size-complex="10pt"/>
    </style:style>
    <style:style style:family="text" style:name="T794">
      <style:text-properties fo:color="#ff0000" fo:font-family="Gadugi" style:font-family-complex="Gadugi" fo:font-size="10pt" style:font-size-complex="10pt" style:text-underline-type="single" style:text-underline-style="solid" style:text-underline-width="auto" style:text-underline-color="font-color" fo:font-weight="bold"/>
    </style:style>
    <style:style style:family="text" style:name="T795">
      <style:text-properties fo:color="#ff0000" fo:font-family="Gadugi" style:font-family-complex="Gadugi" fo:font-size="10pt" style:font-size-complex="10pt" style:text-underline-type="single" style:text-underline-style="solid" style:text-underline-width="auto" style:text-underline-color="font-color"/>
    </style:style>
    <style:style style:family="text" style:name="T796">
      <style:text-properties fo:font-family="Gadugi" style:font-family-complex="Gadugi" fo:font-size="10pt" style:font-size-complex="10pt"/>
    </style:style>
    <style:style style:family="text" style:name="T797">
      <style:text-properties fo:font-family="Gadugi" style:font-family-complex="Gadugi" fo:font-size="8pt" style:font-size-complex="8pt"/>
    </style:style>
    <style:style style:family="text" style:name="T798">
      <style:text-properties fo:font-family="Gadugi" style:font-family-complex="Gadugi" fo:font-size="8pt" style:font-size-complex="8pt"/>
    </style:style>
    <style:style style:family="paragraph" style:name="P129">
      <style:paragraph-properties fo:line-height="150%" fo:text-align="justify" fo:margin-left="0cm" fo:margin-right="0cm" fo:text-indent="1.999cm" fo:margin-top="12pt" fo:margin-bottom="10pt"/>
      <style:text-properties fo:font-family="Gadugi" style:font-family-complex="Gadugi" fo:font-size="10pt" style:font-size-complex="10pt"/>
    </style:style>
    <style:style style:family="text" style:name="T799">
      <style:text-properties fo:font-family="Gadugi" style:font-family-complex="Gadugi" fo:font-size="10pt" style:font-size-complex="10pt"/>
    </style:style>
    <style:style style:family="text" style:name="T800">
      <style:text-properties fo:font-family="Gadugi" style:font-family-complex="Gadugi" fo:font-size="10pt" style:font-size-complex="10pt" fo:font-weight="normal"/>
    </style:style>
    <style:style style:family="text" style:name="T801">
      <style:text-properties fo:font-family="Gadugi" style:font-family-complex="Gadugi" fo:font-size="10pt" style:font-size-complex="10pt"/>
    </style:style>
    <style:style style:family="text" style:name="T802">
      <style:text-properties fo:font-family="Gadugi" style:font-family-complex="Gadugi" fo:font-size="10pt" style:font-size-complex="10pt"/>
    </style:style>
    <style:style style:family="text" style:name="T803">
      <style:text-properties fo:font-family="Gadugi" style:font-family-complex="Gadugi" fo:font-size="8pt" style:font-size-complex="8pt"/>
    </style:style>
    <style:style style:family="text" style:name="T804">
      <style:text-properties fo:font-family="Gadugi" style:font-family-complex="Gadugi" fo:font-size="10pt" style:font-size-complex="10pt"/>
    </style:style>
    <style:style style:family="paragraph" style:name="P130">
      <style:paragraph-properties fo:line-height="150%" fo:text-align="justify" fo:margin-left="0cm" fo:margin-right="0cm" fo:text-indent="1.999cm" fo:margin-top="12pt" fo:margin-bottom="10pt"/>
      <style:text-properties fo:font-family="Gadugi" style:font-family-complex="Gadugi" fo:font-size="10pt" style:font-size-complex="10pt"/>
    </style:style>
    <style:style style:family="text" style:name="T805">
      <style:text-properties fo:font-family="Gadugi" style:font-family-complex="Gadugi" fo:font-size="10pt" style:font-size-complex="10pt"/>
    </style:style>
    <style:style style:family="text" style:name="T806">
      <style:text-properties fo:font-family="Gadugi" style:font-family-complex="Gadugi" fo:font-size="10pt" style:font-size-complex="10pt" fo:font-weight="bold"/>
    </style:style>
    <style:style style:family="text" style:name="T807">
      <style:text-properties fo:font-family="Gadugi" style:font-family-complex="Gadugi" fo:font-size="10pt" style:font-size-complex="10pt"/>
    </style:style>
    <style:style style:family="text" style:name="T808">
      <style:text-properties fo:font-family="Gadugi" style:font-family-complex="Gadugi" fo:font-size="8pt" style:font-size-complex="8pt"/>
    </style:style>
    <style:style style:family="text" style:name="T809">
      <style:text-properties fo:font-family="Gadugi" style:font-family-complex="Gadugi" fo:font-size="10pt" style:font-size-complex="10pt"/>
    </style:style>
    <style:style style:family="paragraph" style:name="P131">
      <style:paragraph-properties fo:line-height="150%" fo:text-align="justify" fo:margin-left="0cm" fo:margin-right="0cm" fo:text-indent="1.999cm" fo:margin-top="12pt" fo:margin-bottom="10pt"/>
      <style:text-properties fo:font-family="Gadugi" style:font-family-complex="Gadugi" fo:font-size="8pt" style:font-size-complex="8pt"/>
    </style:style>
    <style:style style:family="text" style:name="T810">
      <style:text-properties fo:font-family="Gadugi" style:font-family-complex="Gadugi" fo:font-size="10pt" style:font-size-complex="10pt"/>
    </style:style>
    <style:style style:family="text" style:name="T811">
      <style:text-properties fo:font-family="Gadugi" style:font-family-complex="Gadugi" fo:font-size="8pt" style:font-size-complex="8pt"/>
    </style:style>
    <style:style style:family="text" style:name="T812">
      <style:text-properties fo:font-family="Gadugi" style:font-family-complex="Gadugi" fo:font-size="8pt" style:font-size-complex="8pt"/>
    </style:style>
    <style:style style:family="paragraph" style:name="P132">
      <style:paragraph-properties fo:line-height="150%" fo:text-align="justify" fo:margin-left="0cm" fo:margin-right="0cm" fo:text-indent="1.999cm" fo:margin-top="0pt" fo:margin-bottom="10pt"/>
      <style:text-properties fo:font-family="Gadugi" style:font-family-complex="Gadugi" fo:font-size="10pt" style:font-size-complex="10pt"/>
    </style:style>
    <style:style style:family="text" style:name="T813">
      <style:text-properties fo:font-family="Gadugi" style:font-family-complex="Gadugi" fo:font-size="10pt" style:font-size-complex="10pt"/>
    </style:style>
    <style:style style:family="text" style:name="T814">
      <style:text-properties fo:font-family="Gadugi" style:font-family-complex="Gadugi" fo:font-size="10pt" style:font-size-complex="10pt" fo:font-style="italic"/>
    </style:style>
    <style:style style:family="text" style:name="T815">
      <style:text-properties fo:color="#ff0000" fo:font-family="Gadugi" style:font-family-complex="Gadugi" fo:font-size="10pt" style:font-size-complex="10pt" fo:font-style="italic" style:text-underline-type="single" style:text-underline-style="solid" style:text-underline-width="auto" style:text-underline-color="font-color" fo:font-weight="bold"/>
    </style:style>
    <style:style style:family="text" style:name="T816">
      <style:text-properties fo:color="#ff0000" fo:font-family="Gadugi" style:font-family-complex="Gadugi" fo:font-size="10pt" style:font-size-complex="10pt" style:text-underline-type="single" style:text-underline-style="solid" style:text-underline-width="auto" style:text-underline-color="font-color" fo:font-weight="bold"/>
    </style:style>
    <style:style style:family="text" style:name="T817">
      <style:text-properties fo:color="#ff0000" fo:font-family="Gadugi" style:font-family-complex="Gadugi" fo:font-size="10pt" style:font-size-complex="10pt" fo:font-style="italic" style:text-underline-type="single" style:text-underline-style="solid" style:text-underline-width="auto" style:text-underline-color="font-color" fo:font-weight="bold"/>
    </style:style>
    <style:style style:family="text" style:name="T818">
      <style:text-properties fo:font-family="Gadugi" style:font-family-complex="Gadugi" fo:font-size="10pt" style:font-size-complex="10pt" fo:font-style="italic"/>
    </style:style>
    <style:style style:family="text" style:name="T819">
      <style:text-properties fo:font-family="Gadugi" style:font-family-complex="Gadugi" fo:font-size="10pt" style:font-size-complex="10pt"/>
    </style:style>
    <style:style style:family="text" style:name="T820">
      <style:text-properties fo:font-family="Gadugi" style:font-family-complex="Gadugi" fo:font-size="10pt" style:font-size-complex="10pt" fo:font-weight="bold"/>
    </style:style>
    <style:style style:family="text" style:name="T821">
      <style:text-properties fo:font-family="Gadugi" style:font-family-complex="Gadugi" fo:font-size="10pt" style:font-size-complex="10pt"/>
    </style:style>
    <style:style style:family="text" style:name="T822">
      <style:text-properties fo:font-family="Gadugi" style:font-family-complex="Gadugi" fo:font-size="8pt" style:font-size-complex="8pt"/>
    </style:style>
    <style:style style:family="text" style:name="T823">
      <style:text-properties fo:font-family="Gadugi" style:font-family-complex="Gadugi" fo:font-size="10pt" style:font-size-complex="10pt"/>
    </style:style>
    <style:style style:family="paragraph" style:name="P133">
      <style:paragraph-properties fo:line-height="150%" fo:text-align="justify" fo:margin-left="0cm" fo:margin-right="0cm" fo:text-indent="1.999cm" fo:margin-top="0pt" fo:margin-bottom="10pt"/>
      <style:text-properties fo:font-family="Gadugi" style:font-family-complex="Gadugi" fo:font-size="8pt" style:font-size-complex="8pt"/>
    </style:style>
    <style:style style:family="text" style:name="T824">
      <style:text-properties fo:font-family="Gadugi" style:font-family-complex="Gadugi" fo:font-size="10pt" style:font-size-complex="10pt"/>
    </style:style>
    <style:style style:family="text" style:name="T825">
      <style:text-properties fo:font-family="Gadugi" style:font-family-complex="Gadugi" fo:font-size="10pt" style:font-size-complex="10pt"/>
    </style:style>
    <style:style style:family="text" style:name="T826">
      <style:text-properties fo:font-family="Gadugi" style:font-family-complex="Gadugi" fo:font-size="8pt" style:font-size-complex="8pt"/>
    </style:style>
    <style:style style:family="text" style:name="T827">
      <style:text-properties fo:font-family="Gadugi" style:font-family-complex="Gadugi" fo:font-size="8pt" style:font-size-complex="8pt"/>
    </style:style>
    <style:style style:family="paragraph" style:name="P134">
      <style:paragraph-properties fo:line-height="150%" fo:text-align="justify" fo:margin-left="0cm" fo:margin-right="0cm" fo:text-indent="1.999cm" fo:margin-top="0pt" fo:margin-bottom="10pt"/>
      <style:text-properties fo:font-family="Gadugi" style:font-family-complex="Gadugi" fo:font-size="10pt" style:font-size-complex="10pt"/>
    </style:style>
    <style:style style:family="text" style:name="T828">
      <style:text-properties fo:font-family="Gadugi" style:font-family-complex="Gadugi" fo:font-size="10pt" style:font-size-complex="10pt"/>
    </style:style>
    <style:style style:family="text" style:name="T829">
      <style:text-properties fo:font-family="Gadugi" style:font-family-complex="Gadugi" fo:font-size="10pt" style:font-size-complex="10pt" fo:font-weight="bold"/>
    </style:style>
    <style:style style:family="text" style:name="T830">
      <style:text-properties fo:font-family="Gadugi" style:font-family-complex="Gadugi" fo:font-size="10pt" style:font-size-complex="10pt"/>
    </style:style>
    <style:style style:family="text" style:name="T831">
      <style:text-properties fo:font-family="Gadugi" style:font-family-complex="Gadugi" fo:font-size="10pt" style:font-size-complex="10pt"/>
    </style:style>
    <style:style style:family="text" style:name="T832">
      <style:text-properties fo:font-family="Gadugi" style:font-family-complex="Gadugi" fo:font-size="10pt" style:font-size-complex="10pt"/>
    </style:style>
    <style:style style:family="text" style:name="T833">
      <style:text-properties fo:font-family="Gadugi" style:font-family-complex="Gadugi" fo:font-size="10pt" style:font-size-complex="10pt"/>
    </style:style>
    <style:style style:family="paragraph" style:name="P135">
      <style:paragraph-properties fo:line-height="115%" fo:text-align="justify" fo:margin-left="2cm" fo:margin-right="0cm" fo:text-indent="-0.001764cm" fo:margin-top="0pt" fo:margin-bottom="10pt"/>
      <style:text-properties fo:font-family="Gadugi" style:font-family-complex="Gadugi" fo:font-size="10pt" style:font-size-complex="10pt"/>
    </style:style>
    <style:style style:family="text" style:name="T834">
      <style:text-properties fo:font-family="Gadugi" style:font-family-complex="Gadugi" fo:font-size="10pt" style:font-size-complex="10pt"/>
    </style:style>
    <style:style style:family="text" style:name="T835">
      <style:text-properties fo:font-family="Gadugi" style:font-family-complex="Gadugi" fo:font-size="10pt" style:font-size-complex="10pt"/>
    </style:style>
    <style:style style:family="text" style:name="T836">
      <style:text-properties fo:font-family="Gadugi" style:font-family-complex="Gadugi" fo:font-size="10pt" style:font-size-complex="10pt"/>
    </style:style>
    <style:style style:family="paragraph" style:name="P136">
      <style:paragraph-properties fo:line-height="100%" fo:text-align="justify" fo:margin-left="2cm" fo:margin-right="0cm" fo:text-indent="-0.001764cm" fo:margin-top="0pt"/>
      <style:text-properties fo:font-family="Gadugi" style:font-family-complex="Gadugi" fo:font-size="10pt" style:font-size-complex="10pt"/>
    </style:style>
    <style:style style:family="text" style:name="T837">
      <style:text-properties fo:font-family="Gadugi" style:font-family-complex="Gadugi" fo:font-size="10pt" style:font-size-complex="10pt"/>
    </style:style>
    <style:style style:family="text" style:name="T838">
      <style:text-properties fo:font-family="Gadugi" style:font-family-complex="Gadugi" fo:font-size="10pt" style:font-size-complex="10pt"/>
    </style:style>
    <style:style style:family="text" style:name="T839">
      <style:text-properties fo:font-family="Gadugi" style:font-family-complex="Gadugi" fo:font-size="10pt" style:font-size-complex="10pt"/>
    </style:style>
    <style:style style:family="paragraph" style:name="P137">
      <style:paragraph-properties fo:line-height="115%" fo:text-align="justify" fo:margin-left="2cm" fo:margin-right="0cm" fo:text-indent="-0.001764cm" fo:margin-top="0pt" fo:margin-bottom="10pt"/>
      <style:text-properties fo:font-family="Gadugi" style:font-family-complex="Gadugi" fo:font-size="10pt" style:font-size-complex="10pt"/>
    </style:style>
    <style:style style:family="text" style:name="T840">
      <style:text-properties fo:font-family="Gadugi" style:font-family-complex="Gadugi" fo:font-size="10pt" style:font-size-complex="10pt"/>
    </style:style>
    <style:style style:family="text" style:name="T841">
      <style:text-properties fo:font-family="Gadugi" style:font-family-complex="Gadugi" fo:font-size="10pt" style:font-size-complex="10pt"/>
    </style:style>
    <style:style style:family="text" style:name="T842">
      <style:text-properties fo:font-family="Gadugi" style:font-family-complex="Gadugi" fo:font-size="10pt" style:font-size-complex="10pt"/>
    </style:style>
    <style:style style:family="text" style:name="T843">
      <style:text-properties fo:font-family="Gadugi" style:font-family-complex="Gadugi" fo:font-size="10pt" style:font-size-complex="10pt"/>
    </style:style>
    <style:style style:family="paragraph" style:name="P138">
      <style:paragraph-properties fo:line-height="100%" fo:text-align="justify" fo:margin-left="2cm" fo:margin-right="0cm" fo:text-indent="-0.001764cm" fo:margin-top="0pt"/>
      <style:text-properties fo:font-family="Gadugi" style:font-family-complex="Gadugi" fo:font-size="10pt" style:font-size-complex="10pt"/>
    </style:style>
    <style:style style:family="text" style:name="T844">
      <style:text-properties fo:font-family="Gadugi" style:font-family-complex="Gadugi" fo:font-size="10pt" style:font-size-complex="10pt"/>
    </style:style>
    <style:style style:family="text" style:name="T845">
      <style:text-properties fo:font-family="Gadugi" style:font-family-complex="Gadugi" fo:font-size="10pt" style:font-size-complex="10pt"/>
    </style:style>
    <style:style style:family="text" style:name="T846">
      <style:text-properties fo:font-family="Gadugi" style:font-family-complex="Gadugi" fo:font-size="10pt" style:font-size-complex="10pt"/>
    </style:style>
    <style:style style:family="paragraph" style:name="P139">
      <style:paragraph-properties fo:line-height="150%" fo:text-align="justify" fo:margin-left="0cm" fo:margin-right="0cm" fo:text-indent="1.999cm" fo:margin-top="0pt" fo:margin-bottom="10pt"/>
      <style:text-properties fo:font-family="Gadugi" style:font-family-complex="Gadugi" fo:font-size="8pt" style:font-size-complex="8pt"/>
    </style:style>
    <style:style style:family="text" style:name="T847">
      <style:text-properties fo:font-family="Gadugi" style:font-family-complex="Gadugi" fo:font-size="10pt" style:font-size-complex="10pt"/>
    </style:style>
    <style:style style:family="text" style:name="T848">
      <style:text-properties fo:font-family="Gadugi" style:font-family-complex="Gadugi" fo:font-size="10pt" style:font-size-complex="10pt"/>
    </style:style>
    <style:style style:family="text" style:name="T849">
      <style:text-properties fo:font-family="Gadugi" style:font-family-complex="Gadugi" fo:font-size="8pt" style:font-size-complex="8pt"/>
    </style:style>
    <style:style style:family="text" style:name="T850">
      <style:text-properties fo:font-family="Gadugi" style:font-family-complex="Gadugi" fo:font-size="8pt" style:font-size-complex="8pt"/>
    </style:style>
    <style:style style:family="paragraph" style:name="P140">
      <style:paragraph-properties fo:line-height="150%" fo:text-align="justify" fo:margin-left="0cm" fo:margin-right="0cm" fo:text-indent="1.999cm" fo:margin-top="0pt" fo:margin-bottom="10pt"/>
      <style:text-properties fo:font-family="Gadugi" style:font-family-complex="Gadugi" fo:font-size="10pt" style:font-size-complex="10pt"/>
    </style:style>
    <style:style style:family="text" style:name="T851">
      <style:text-properties fo:font-family="Gadugi" style:font-family-complex="Gadugi" fo:font-size="10pt" style:font-size-complex="10pt"/>
    </style:style>
    <style:style style:family="text" style:name="T852">
      <style:text-properties fo:font-family="Gadugi" style:font-family-complex="Gadugi" fo:font-size="10pt" style:font-size-complex="10pt" fo:font-weight="bold"/>
    </style:style>
    <style:style style:family="text" style:name="T853">
      <style:text-properties fo:font-family="Gadugi" style:font-family-complex="Gadugi" fo:font-size="10pt" style:font-size-complex="10pt"/>
    </style:style>
    <style:style style:family="text" style:name="T854">
      <style:text-properties fo:font-family="Gadugi" style:font-family-complex="Gadugi" fo:font-size="8pt" style:font-size-complex="8pt"/>
    </style:style>
    <style:style style:family="text" style:name="T855">
      <style:text-properties fo:font-family="Gadugi" style:font-family-complex="Gadugi" fo:font-size="10pt" style:font-size-complex="10pt"/>
    </style:style>
    <style:style style:family="paragraph" style:name="P141">
      <style:paragraph-properties fo:line-height="115%" fo:text-align="justify" fo:margin-left="3.001cm" fo:margin-right="0cm" fo:text-indent="0cm" fo:margin-top="12pt" fo:margin-bottom="10pt"/>
      <style:text-properties fo:font-family="Gadugi" style:font-family-complex="Gadugi" fo:font-size="8pt" style:font-size-complex="8pt"/>
    </style:style>
    <style:style style:family="text" style:name="T856">
      <style:text-properties fo:font-family="Gadugi" style:font-family-complex="Gadugi" fo:font-size="10pt" style:font-size-complex="10pt"/>
    </style:style>
    <style:style style:family="text" style:name="T857">
      <style:text-properties fo:font-family="Gadugi" style:font-family-complex="Gadugi" fo:font-size="10pt" style:font-size-complex="10pt"/>
    </style:style>
    <style:style style:family="text" style:name="T858">
      <style:text-properties fo:font-family="Gadugi" style:font-family-complex="Gadugi" fo:font-size="8pt" style:font-size-complex="8pt"/>
    </style:style>
    <style:style style:family="text" style:name="T859">
      <style:text-properties fo:font-family="Gadugi" style:font-family-complex="Gadugi" fo:font-size="10pt" style:font-size-complex="10pt"/>
    </style:style>
    <style:style style:family="paragraph" style:name="P142">
      <style:paragraph-properties fo:line-height="115%" fo:text-align="justify" fo:margin-left="3.001cm" fo:margin-right="0cm" fo:text-indent="0cm" fo:margin-top="12pt" fo:margin-bottom="10pt"/>
      <style:text-properties fo:font-family="Gadugi" style:font-family-complex="Gadugi" fo:font-size="8pt" style:font-size-complex="8pt"/>
    </style:style>
    <style:style style:family="text" style:name="T860">
      <style:text-properties fo:font-family="Gadugi" style:font-family-complex="Gadugi" fo:font-size="10pt" style:font-size-complex="10pt"/>
    </style:style>
    <style:style style:family="text" style:name="T861">
      <style:text-properties fo:font-family="Gadugi" style:font-family-complex="Gadugi" fo:font-size="8pt" style:font-size-complex="8pt"/>
    </style:style>
    <style:style style:family="text" style:name="T862">
      <style:text-properties fo:font-family="Gadugi" style:font-family-complex="Gadugi" fo:font-size="8pt" style:font-size-complex="8pt"/>
    </style:style>
    <style:style style:family="paragraph" style:name="P143">
      <style:paragraph-properties fo:line-height="150%" fo:text-align="center" fo:margin-top="15pt" fo:margin-bottom="10pt"/>
      <style:text-properties fo:font-family="Gadugi" style:font-family-complex="Gadugi" fo:font-size="8pt" style:font-size-complex="8pt"/>
    </style:style>
    <style:style style:family="text" style:name="T863">
      <style:text-properties fo:font-family="Gadugi" style:font-family-complex="Gadugi" fo:font-size="10pt" style:font-size-complex="10pt" fo:font-weight="bold"/>
    </style:style>
    <style:style style:family="text" style:name="T864">
      <style:text-properties fo:font-family="Gadugi" style:font-family-complex="Gadugi" fo:font-size="8pt" style:font-size-complex="8pt"/>
    </style:style>
    <style:style style:family="text" style:name="T865">
      <style:text-properties fo:font-family="Gadugi" style:font-family-complex="Gadugi" fo:font-size="8pt" style:font-size-complex="8pt"/>
    </style:style>
    <style:style style:family="paragraph" style:name="P144">
      <style:paragraph-properties fo:line-height="150%" fo:text-align="justify" fo:margin-left="0cm" fo:margin-right="0cm" fo:text-indent="1.999cm" fo:margin-top="0pt" fo:margin-bottom="10pt"/>
      <style:text-properties fo:font-family="Gadugi" style:font-family-complex="Gadugi" fo:font-size="10pt" style:font-size-complex="10pt"/>
    </style:style>
    <style:style style:family="text" style:name="T866">
      <style:text-properties fo:font-family="Gadugi" style:font-family-complex="Gadugi" fo:font-size="10pt" style:font-size-complex="10pt"/>
    </style:style>
    <style:style style:family="text" style:name="T867">
      <style:text-properties fo:font-family="Gadugi" style:font-family-complex="Gadugi" fo:font-size="10pt" style:font-size-complex="10pt" fo:font-style="italic"/>
    </style:style>
    <style:style style:family="text" style:name="T868">
      <style:text-properties fo:font-family="Gadugi" style:font-family-complex="Gadugi" fo:font-size="10pt" style:font-size-complex="10pt"/>
    </style:style>
    <style:style style:family="text" style:name="T869">
      <style:text-properties fo:font-family="Gadugi" style:font-family-complex="Gadugi" fo:font-size="10pt" style:font-size-complex="10pt" fo:font-weight="bold"/>
    </style:style>
    <style:style style:family="text" style:name="T870">
      <style:text-properties fo:font-family="Gadugi" style:font-family-complex="Gadugi" fo:font-size="10pt" style:font-size-complex="10pt"/>
    </style:style>
    <style:style style:family="text" style:name="T871">
      <style:text-properties fo:font-family="Gadugi" style:font-family-complex="Gadugi" fo:font-size="8pt" style:font-size-complex="8pt"/>
    </style:style>
    <style:style style:family="text" style:name="T872">
      <style:text-properties fo:font-family="Gadugi" style:font-family-complex="Gadugi" fo:font-size="10pt" style:font-size-complex="10pt"/>
    </style:style>
    <style:style style:family="paragraph" style:name="P145">
      <style:paragraph-properties fo:line-height="150%" fo:text-align="justify" fo:margin-left="0cm" fo:margin-right="0cm" fo:text-indent="2cm" fo:margin-top="0pt" fo:margin-bottom="10pt"/>
      <style:text-properties fo:font-family="Gadugi" style:font-family-complex="Gadugi" fo:font-size="8pt" style:font-size-complex="8pt"/>
    </style:style>
    <style:style style:family="text" style:name="T873">
      <style:text-properties fo:font-family="Gadugi" style:font-family-complex="Gadugi" fo:font-size="10pt" style:font-size-complex="10pt"/>
    </style:style>
    <style:style style:family="text" style:name="T874">
      <style:text-properties fo:font-family="Gadugi" style:font-family-complex="Gadugi" fo:font-size="8pt" style:font-size-complex="8pt"/>
    </style:style>
    <style:style style:family="text" style:name="T875">
      <style:text-properties fo:font-family="Gadugi" style:font-family-complex="Gadugi" fo:font-size="8pt" style:font-size-complex="8pt"/>
    </style:style>
    <style:style style:family="paragraph" style:name="P146">
      <style:paragraph-properties fo:line-height="115%" fo:text-align="justify" fo:margin-left="3.001cm" fo:margin-right="0cm" fo:text-indent="0cm" fo:margin-top="0pt" fo:margin-bottom="10pt"/>
      <style:text-properties fo:font-family="Gadugi" style:font-family-complex="Gadugi" fo:font-size="8pt" style:font-size-complex="8pt"/>
    </style:style>
    <style:style style:family="text" style:name="T876">
      <style:text-properties fo:font-family="Gadugi" style:font-family-complex="Gadugi" fo:font-size="10pt" style:font-size-complex="10pt" fo:font-weight="bold"/>
    </style:style>
    <style:style style:family="text" style:name="T877">
      <style:text-properties fo:font-family="Gadugi" style:font-family-complex="Gadugi" fo:font-size="10pt" style:font-size-complex="10pt"/>
    </style:style>
    <style:style style:family="text" style:name="T878">
      <style:text-properties fo:font-family="Gadugi" style:font-family-complex="Gadugi" fo:font-size="10pt" style:font-size-complex="10pt" fo:font-weight="bold"/>
    </style:style>
    <style:style style:family="text" style:name="T879">
      <style:text-properties fo:font-family="Gadugi" style:font-family-complex="Gadugi" fo:font-size="10pt" style:font-size-complex="10pt"/>
    </style:style>
    <style:style style:family="text" style:name="T880">
      <style:text-properties fo:font-family="Gadugi" style:font-family-complex="Gadugi" fo:font-size="8pt" style:font-size-complex="8pt"/>
    </style:style>
    <style:style style:family="text" style:name="T881">
      <style:text-properties fo:font-family="Gadugi" style:font-family-complex="Gadugi" fo:font-size="8pt" style:font-size-complex="8pt"/>
    </style:style>
    <style:style style:family="paragraph" style:name="P147">
      <style:paragraph-properties fo:line-height="115%" fo:text-align="justify" fo:margin-left="3.001cm" fo:margin-right="0cm" fo:text-indent="0cm" fo:margin-top="12pt" fo:margin-bottom="10pt"/>
      <style:text-properties fo:font-family="Gadugi" style:font-family-complex="Gadugi" fo:font-size="8pt" style:font-size-complex="8pt"/>
    </style:style>
    <style:style style:family="text" style:name="T882">
      <style:text-properties fo:font-family="Gadugi" style:font-family-complex="Gadugi" fo:font-size="10pt" style:font-size-complex="10pt" fo:font-weight="bold"/>
    </style:style>
    <style:style style:family="text" style:name="T883">
      <style:text-properties fo:font-family="Gadugi" style:font-family-complex="Gadugi" fo:font-size="10pt" style:font-size-complex="10pt"/>
    </style:style>
    <style:style style:family="text" style:name="T884">
      <style:text-properties fo:font-family="Gadugi" style:font-family-complex="Gadugi" fo:font-size="10pt" style:font-size-complex="10pt" fo:font-weight="bold"/>
    </style:style>
    <style:style style:family="text" style:name="T885">
      <style:text-properties fo:font-family="Gadugi" style:font-family-complex="Gadugi" fo:font-size="10pt" style:font-size-complex="10pt"/>
    </style:style>
    <style:style style:family="text" style:name="T886">
      <style:text-properties fo:font-family="Gadugi" style:font-family-complex="Gadugi" fo:font-size="10pt" style:font-size-complex="10pt" fo:font-weight="bold"/>
    </style:style>
    <style:style style:family="text" style:name="T887">
      <style:text-properties fo:font-family="Gadugi" style:font-family-complex="Gadugi" fo:font-size="10pt" style:font-size-complex="10pt"/>
    </style:style>
    <style:style style:family="text" style:name="T888">
      <style:text-properties fo:font-family="Gadugi" style:font-family-complex="Gadugi" fo:font-size="10pt" style:font-size-complex="10pt" fo:font-weight="bold"/>
    </style:style>
    <style:style style:family="text" style:name="T889">
      <style:text-properties fo:font-family="Gadugi" style:font-family-complex="Gadugi" fo:font-size="10pt" style:font-size-complex="10pt"/>
    </style:style>
    <style:style style:family="text" style:name="T890">
      <style:text-properties fo:font-family="Gadugi" style:font-family-complex="Gadugi" fo:font-size="8pt" style:font-size-complex="8pt"/>
    </style:style>
    <style:style style:family="text" style:name="T891">
      <style:text-properties fo:font-family="Gadugi" style:font-family-complex="Gadugi" fo:font-size="10pt" style:font-size-complex="10pt"/>
    </style:style>
    <style:style style:family="paragraph" style:name="P148">
      <style:paragraph-properties fo:line-height="115%" fo:text-align="justify" fo:margin-left="3.001cm" fo:margin-right="0cm" fo:text-indent="0cm" fo:margin-top="12pt" fo:margin-bottom="10pt"/>
      <style:text-properties fo:font-family="Gadugi" style:font-family-complex="Gadugi" fo:font-size="8pt" style:font-size-complex="8pt"/>
    </style:style>
    <style:style style:family="text" style:name="T892">
      <style:text-properties fo:font-family="Gadugi" style:font-family-complex="Gadugi" fo:font-size="10pt" style:font-size-complex="10pt" fo:font-weight="bold"/>
    </style:style>
    <style:style style:family="text" style:name="T893">
      <style:text-properties fo:font-family="Gadugi" style:font-family-complex="Gadugi" fo:font-size="10pt" style:font-size-complex="10pt"/>
    </style:style>
    <style:style style:family="text" style:name="T894">
      <style:text-properties fo:font-family="Gadugi" style:font-family-complex="Gadugi" fo:font-size="10pt" style:font-size-complex="10pt" fo:font-weight="bold"/>
    </style:style>
    <style:style style:family="text" style:name="T895">
      <style:text-properties fo:font-family="Gadugi" style:font-family-complex="Gadugi" fo:font-size="10pt" style:font-size-complex="10pt"/>
    </style:style>
    <style:style style:family="text" style:name="T896">
      <style:text-properties fo:font-family="Gadugi" style:font-family-complex="Gadugi" fo:font-size="10pt" style:font-size-complex="10pt"/>
    </style:style>
    <style:style style:family="text" style:name="T897">
      <style:text-properties fo:font-family="Gadugi" style:font-family-complex="Gadugi" fo:font-size="8pt" style:font-size-complex="8pt"/>
    </style:style>
    <style:style style:family="text" style:name="T898">
      <style:text-properties fo:font-family="Gadugi" style:font-family-complex="Gadugi" fo:font-size="8pt" style:font-size-complex="8pt"/>
    </style:style>
    <style:style style:family="paragraph" style:name="P149">
      <style:paragraph-properties fo:line-height="150%" fo:text-align="justify" fo:margin-left="0cm" fo:margin-right="0cm" fo:text-indent="1.999cm" fo:margin-top="0pt" fo:margin-bottom="10pt"/>
      <style:text-properties fo:font-family="Gadugi" style:font-family-complex="Gadugi" fo:font-size="8pt" style:font-size-complex="8pt"/>
    </style:style>
    <style:style style:family="text" style:name="T899">
      <style:text-properties fo:font-family="Gadugi" style:font-family-complex="Gadugi" fo:font-size="10pt" style:font-size-complex="10pt"/>
    </style:style>
    <style:style style:family="text" style:name="T900">
      <style:text-properties fo:font-family="Gadugi" style:font-family-complex="Gadugi" fo:font-size="8pt" style:font-size-complex="8pt"/>
    </style:style>
    <style:style style:family="text" style:name="T901">
      <style:text-properties fo:font-family="Gadugi" style:font-family-complex="Gadugi" fo:font-size="8pt" style:font-size-complex="8pt"/>
    </style:style>
    <style:style style:family="paragraph" style:name="P150">
      <style:paragraph-properties fo:margin-top="0pt" fo:margin-bottom="0pt"/>
      <style:text-properties/>
    </style:style>
    <style:style style:parent-style-name="904" style:family="paragraph" style:name="P151">
      <style:paragraph-properties fo:line-height="150%" fo:text-align="justify" fo:margin-left="1.101cm" fo:margin-right="0cm" fo:text-indent="0.8961cm" fo:margin-top="0pt" fo:margin-bottom="0.05pt"/>
      <style:text-properties fo:color="#000000" fo:font-family="Lucida Sans" style:font-family-complex="Lucida Sans" fo:font-size="13pt" style:font-size-complex="13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parent-style-name="929" style:family="text" style:name="T902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family="text" style:name="T903">
      <style:text-properties fo:color="#000000" fo:font-family="Gadugi" style:font-family-complex="Gadugi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family="text" style:name="T904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family="text" style:name="T905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 fo:font-weight="bold"/>
    </style:style>
    <style:style style:parent-style-name="904" style:family="paragraph" style:name="P152">
      <style:paragraph-properties fo:line-height="150%" fo:text-align="justify" fo:margin-left="1.101cm" fo:margin-right="0cm" fo:text-indent="0.8961cm" fo:margin-top="0pt" fo:margin-bottom="0.05pt"/>
      <style:text-properties fo:color="#000000" fo:font-family="Lucida Sans" style:font-family-complex="Lucida Sans" fo:font-size="13pt" style:font-size-complex="13pt" fo:language="pt" style:language-complex="ar" fo:country="PT" style:country-complex="SA" style:text-underline-type="single" style:text-underline-style="solid" style:text-underline-width="auto" style:text-underline-color="font-color"/>
    </style:style>
    <style:style style:parent-style-name="929" style:family="text" style:name="T906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/>
    </style:style>
    <style:style style:family="text" style:name="T907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/>
    </style:style>
    <style:style style:family="text" style:name="T908">
      <style:text-properties fo:color="#000000" fo:font-family="Tahoma" style:font-family-complex="Tahoma" fo:font-size="10pt" style:font-size-complex="10pt" fo:language="pt" style:language-complex="ar" fo:country="PT" style:country-complex="SA" style:text-underline-type="single" style:text-underline-style="solid" style:text-underline-width="auto" style:text-underline-color="font-color"/>
    </style:style>
    <style:style style:parent-style-name="898" style:family="paragraph" style:name="P153">
      <style:paragraph-properties fo:line-height="150%" fo:text-align="justify" fo:margin-left="0cm" fo:margin-right="0cm" fo:text-indent="1.997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909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910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911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912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913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914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915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916">
      <style:text-properties fo:color="#000000" fo:font-family="Tahoma" style:font-family-complex="Tahoma" fo:font-size="10pt" style:font-size-complex="10pt" fo:language="pt" style:language-complex="ar" fo:country="PT" style:country-complex="SA"/>
    </style:style>
    <style:style style:family="text" style:name="T917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parent-style-name="898" style:family="paragraph" style:name="P154">
      <style:paragraph-properties fo:line-height="150%" fo:text-align="justify" fo:margin-left="0cm" fo:margin-right="0cm" fo:text-indent="1.997cm" fo:margin-top="0pt" fo:margin-bottom="0.05pt"/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text" style:name="T918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919">
      <style:text-properties fo:color="#000000" fo:font-family="Gadugi" style:font-family-complex="Gadugi" fo:font-size="10pt" style:font-size-complex="10pt" fo:language="pt" style:language-complex="ar" fo:country="PT" style:country-complex="SA"/>
    </style:style>
    <style:style style:family="text" style:name="T920">
      <style:text-properties fo:color="#000000" fo:font-family="Gill Sans MT" style:font-family-complex="Gill Sans MT" fo:font-size="9pt" style:font-size-complex="9pt" fo:language="pt" style:language-complex="ar" fo:country="PT" style:country-complex="SA"/>
    </style:style>
    <style:style style:family="paragraph" style:name="P155">
      <style:paragraph-properties fo:line-height="115%" fo:text-align="justify" fo:margin-left="2cm" fo:margin-right="0cm" fo:text-indent="0cm" fo:margin-top="0pt" fo:margin-bottom="10pt"/>
      <style:text-properties fo:font-family="Gadugi" style:font-family-complex="Gadugi" fo:font-size="8pt" style:font-size-complex="8pt"/>
    </style:style>
    <style:style style:family="text" style:name="T921">
      <style:text-properties fo:font-family="Gadugi" style:font-family-complex="Gadugi" fo:font-size="10pt" style:font-size-complex="10pt" fo:font-weight="bold"/>
    </style:style>
    <style:style style:family="text" style:name="T922">
      <style:text-properties fo:font-family="Gadugi" style:font-family-complex="Gadugi" fo:font-size="10pt" style:font-size-complex="10pt"/>
    </style:style>
    <style:style style:family="text" style:name="T923">
      <style:text-properties fo:font-family="Gadugi" style:font-family-complex="Gadugi" fo:font-size="10pt" style:font-size-complex="10pt"/>
    </style:style>
    <style:style style:family="text" style:name="T924">
      <style:text-properties fo:font-family="Gadugi" style:font-family-complex="Gadugi" fo:font-size="8pt" style:font-size-complex="8pt"/>
    </style:style>
    <style:style style:family="text" style:name="T925">
      <style:text-properties fo:font-family="Gadugi" style:font-family-complex="Gadugi" fo:font-size="8pt" style:font-size-complex="8pt"/>
    </style:style>
    <style:style style:family="paragraph" style:name="P156">
      <style:paragraph-properties fo:line-height="100%" fo:text-align="justify" fo:margin-left="2cm" fo:margin-right="0cm" fo:text-indent="0cm" fo:margin-top="0pt"/>
      <style:text-properties fo:font-family="Gadugi" style:font-family-complex="Gadugi" fo:font-size="8pt" style:font-size-complex="8pt"/>
    </style:style>
    <style:style style:family="text" style:name="T926">
      <style:text-properties fo:font-family="Gadugi" style:font-family-complex="Gadugi" fo:font-size="8pt" style:font-size-complex="8pt"/>
    </style:style>
    <style:style style:family="text" style:name="T927">
      <style:text-properties fo:font-family="Gadugi" style:font-family-complex="Gadugi" fo:font-size="8pt" style:font-size-complex="8pt"/>
    </style:style>
    <style:style style:family="text" style:name="T928">
      <style:text-properties fo:font-family="Gadugi" style:font-family-complex="Gadugi" fo:font-size="8pt" style:font-size-complex="8pt"/>
    </style:style>
    <style:style style:family="paragraph" style:name="P157">
      <style:paragraph-properties fo:line-height="115%" fo:text-align="justify" fo:margin-left="2cm" fo:margin-right="0cm" fo:text-indent="0cm" fo:margin-top="0pt" fo:margin-bottom="10pt"/>
      <style:text-properties fo:font-family="Gadugi" style:font-family-complex="Gadugi" fo:font-size="8pt" style:font-size-complex="8pt"/>
    </style:style>
    <style:style style:family="text" style:name="T929">
      <style:text-properties fo:font-family="Gadugi" style:font-family-complex="Gadugi" fo:font-size="10pt" style:font-size-complex="10pt" fo:font-weight="bold"/>
    </style:style>
    <style:style style:family="text" style:name="T930">
      <style:text-properties fo:font-family="Gadugi" style:font-family-complex="Gadugi" fo:font-size="10pt" style:font-size-complex="10pt"/>
    </style:style>
    <style:style style:family="text" style:name="T931">
      <style:text-properties fo:font-family="Gadugi" style:font-family-complex="Gadugi" fo:font-size="10pt" style:font-size-complex="10pt"/>
    </style:style>
    <style:style style:family="text" style:name="T932">
      <style:text-properties fo:font-family="Gadugi" style:font-family-complex="Gadugi" fo:font-size="8pt" style:font-size-complex="8pt"/>
    </style:style>
    <style:style style:family="text" style:name="T933">
      <style:text-properties fo:font-family="Gadugi" style:font-family-complex="Gadugi" fo:font-size="8pt" style:font-size-complex="8pt"/>
    </style:style>
    <style:style style:family="paragraph" style:name="P158">
      <style:paragraph-properties fo:line-height="100%" fo:text-align="justify" fo:margin-left="2cm" fo:margin-right="0cm" fo:text-indent="0cm" fo:margin-top="0pt"/>
      <style:text-properties fo:font-family="Gadugi" style:font-family-complex="Gadugi" fo:font-size="8pt" style:font-size-complex="8pt"/>
    </style:style>
    <style:style style:family="text" style:name="T934">
      <style:text-properties fo:font-family="Gadugi" style:font-family-complex="Gadugi" fo:font-size="8pt" style:font-size-complex="8pt"/>
    </style:style>
    <style:style style:family="text" style:name="T935">
      <style:text-properties fo:font-family="Gadugi" style:font-family-complex="Gadugi" fo:font-size="8pt" style:font-size-complex="8pt"/>
    </style:style>
    <style:style style:family="text" style:name="T936">
      <style:text-properties fo:font-family="Gadugi" style:font-family-complex="Gadugi" fo:font-size="8pt" style:font-size-complex="8pt"/>
    </style:style>
    <style:style style:family="paragraph" style:name="P159">
      <style:paragraph-properties fo:line-height="115%" fo:text-align="justify" fo:margin-left="2cm" fo:margin-right="0cm" fo:text-indent="0cm" fo:margin-top="0pt" fo:margin-bottom="10pt"/>
      <style:text-properties fo:font-family="Gadugi" style:font-family-complex="Gadugi" fo:font-size="10pt" style:font-size-complex="10pt"/>
    </style:style>
    <style:style style:family="text" style:name="T937">
      <style:text-properties fo:font-family="Gadugi" style:font-family-complex="Gadugi" fo:font-size="10pt" style:font-size-complex="10pt" fo:font-weight="bold"/>
    </style:style>
    <style:style style:family="text" style:name="T938">
      <style:text-properties fo:font-family="Gadugi" style:font-family-complex="Gadugi" fo:font-size="10pt" style:font-size-complex="10pt"/>
    </style:style>
    <style:style style:family="text" style:name="T939">
      <style:text-properties fo:font-family="Gadugi" style:font-family-complex="Gadugi" fo:font-size="8pt" style:font-size-complex="8pt"/>
    </style:style>
    <style:style style:family="text" style:name="T940">
      <style:text-properties fo:font-family="Gadugi" style:font-family-complex="Gadugi" fo:font-size="10pt" style:font-size-complex="10pt"/>
    </style:style>
    <style:style style:family="paragraph" style:name="P160">
      <style:paragraph-properties fo:line-height="150%" fo:text-align="justify" fo:margin-left="2cm" fo:margin-right="0cm" fo:text-indent="0.5345cm" fo:margin-top="0pt" fo:margin-bottom="10pt"/>
      <style:text-properties fo:font-family="Gadugi" style:font-family-complex="Gadugi" fo:font-size="10pt" style:font-size-complex="10pt"/>
    </style:style>
    <style:style style:family="text" style:name="T941">
      <style:text-properties fo:font-family="Gadugi" style:font-family-complex="Gadugi" fo:font-size="10pt" style:font-size-complex="10pt"/>
    </style:style>
    <style:style style:family="text" style:name="T942">
      <style:text-properties fo:font-family="Gadugi" style:font-family-complex="Gadugi" fo:font-size="10pt" style:font-size-complex="10pt"/>
    </style:style>
    <style:style style:family="text" style:name="T943">
      <style:text-properties fo:font-family="Gadugi" style:font-family-complex="Gadugi" fo:font-size="8pt" style:font-size-complex="8pt"/>
    </style:style>
    <style:style style:family="text" style:name="T944">
      <style:text-properties fo:font-family="Gadugi" style:font-family-complex="Gadugi" fo:font-size="10pt" style:font-size-complex="10pt"/>
    </style:style>
    <style:style style:family="paragraph" style:name="P161">
      <style:paragraph-properties fo:line-height="150%" fo:text-align="justify" fo:margin-left="2.5cm" fo:margin-right="0cm" fo:text-indent="0.03528cm" fo:margin-top="0pt" fo:margin-bottom="10pt"/>
      <style:text-properties fo:font-family="Gadugi" style:font-family-complex="Gadugi" fo:font-size="10pt" style:font-size-complex="10pt"/>
    </style:style>
    <style:style style:family="text" style:name="T945">
      <style:text-properties fo:font-family="Gadugi" style:font-family-complex="Gadugi" fo:font-size="10pt" style:font-size-complex="10pt"/>
    </style:style>
    <style:style style:family="text" style:name="T946">
      <style:text-properties fo:font-family="Gadugi" style:font-family-complex="Gadugi" fo:font-size="8pt" style:font-size-complex="8pt"/>
    </style:style>
    <style:style style:family="text" style:name="T947">
      <style:text-properties fo:font-family="Gadugi" style:font-family-complex="Gadugi" fo:font-size="10pt" style:font-size-complex="10pt"/>
    </style:style>
    <style:style style:family="paragraph" style:name="P162">
      <style:paragraph-properties fo:line-height="150%" fo:text-align="justify" fo:margin-left="2cm" fo:margin-right="0cm" fo:text-indent="0.5345cm" fo:margin-top="0pt" fo:margin-bottom="10pt"/>
      <style:text-properties fo:font-family="Gadugi" style:font-family-complex="Gadugi" fo:font-size="8pt" style:font-size-complex="8pt"/>
    </style:style>
    <style:style style:family="text" style:name="T948">
      <style:text-properties fo:font-family="Gadugi" style:font-family-complex="Gadugi" fo:font-size="10pt" style:font-size-complex="10pt"/>
    </style:style>
    <style:style style:family="text" style:name="T949">
      <style:text-properties fo:font-family="Gadugi" style:font-family-complex="Gadugi" fo:font-size="8pt" style:font-size-complex="8pt"/>
    </style:style>
    <style:style style:family="text" style:name="T950">
      <style:text-properties fo:font-family="Gadugi" style:font-family-complex="Gadugi" fo:font-size="8pt" style:font-size-complex="8pt"/>
    </style:style>
    <style:style style:parent-style-name="896" style:family="paragraph" style:name="P163">
      <style:paragraph-properties fo:line-height="150%" fo:text-align="justify" fo:margin-left="4.001cm" fo:margin-right="0cm" fo:text-indent="0cm">
        <style:tab-stops>
          <style:tab-stop style:position="0.9984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951">
      <style:text-properties fo:color="#000000" fo:font-family="Gadugi" style:font-family-complex="Gadugi" fo:font-size="10pt" style:font-size-complex="10pt" fo:language="pt" style:language-complex="hi" fo:country="PT" style:country-complex="IN"/>
    </style:style>
    <style:style style:family="text" style:name="T952">
      <style:text-properties fo:color="#000000" fo:font-family="Gadugi" style:font-family-complex="Gadugi" fo:font-size="10pt" style:font-size-complex="10pt" fo:language="pt" style:language-complex="hi" fo:country="PT" style:country-complex="IN"/>
    </style:style>
    <style:style style:family="text" style:name="T953">
      <style:text-properties fo:color="#000000" fo:font-family="Gadugi" style:font-family-complex="Gadugi" fo:font-size="10pt" style:font-size-complex="10pt" fo:language="pt" style:language-complex="hi" fo:country="PT" style:country-complex="IN"/>
    </style:style>
    <style:style style:parent-style-name="896" style:family="paragraph" style:name="P164">
      <style:paragraph-properties fo:line-height="150%" fo:text-align="justify" fo:margin-left="4.001cm" fo:margin-right="0cm" fo:text-indent="0cm">
        <style:tab-stops>
          <style:tab-stop style:position="0.9984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954">
      <style:text-properties fo:color="#000000" fo:font-family="Gadugi" style:font-family-complex="Gadugi" fo:font-size="10pt" style:font-size-complex="10pt" fo:language="pt" style:language-complex="hi" fo:country="PT" style:country-complex="IN"/>
    </style:style>
    <style:style style:family="text" style:name="T955">
      <style:text-properties fo:color="#000000" fo:font-family="Gadugi" style:font-family-complex="Gadugi" fo:font-size="10pt" style:font-size-complex="10pt" fo:language="pt" style:language-complex="hi" fo:country="PT" style:country-complex="IN"/>
    </style:style>
    <style:style style:family="text" style:name="T956">
      <style:text-properties fo:color="#000000" fo:font-family="Gadugi" style:font-family-complex="Gadugi" fo:font-size="10pt" style:font-size-complex="10pt" fo:language="pt" style:language-complex="hi" fo:country="PT" style:country-complex="IN"/>
    </style:style>
    <style:style style:parent-style-name="896" style:family="paragraph" style:name="P165">
      <style:paragraph-properties fo:line-height="150%" fo:text-align="justify" fo:margin-left="4.001cm" fo:margin-right="0cm" fo:text-indent="0cm">
        <style:tab-stops>
          <style:tab-stop style:position="0.9984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957">
      <style:text-properties fo:color="#000000" fo:font-family="Gadugi" style:font-family-complex="Gadugi" fo:font-size="10pt" style:font-size-complex="10pt" fo:language="pt" style:language-complex="hi" fo:country="PT" style:country-complex="IN"/>
    </style:style>
    <style:style style:family="text" style:name="T958">
      <style:text-properties fo:color="#000000" fo:font-family="Gadugi" style:font-family-complex="Gadugi" fo:font-size="11pt" style:font-size-complex="11pt" fo:language="pt" style:language-complex="ar" fo:country="PT" style:country-complex="SA"/>
    </style:style>
    <style:style style:family="text" style:name="T959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166">
      <style:paragraph-properties fo:line-height="150%" fo:text-align="justify" fo:margin-left="4.001cm" fo:margin-right="1.603cm" fo:text-indent="0cm">
        <style:tab-stops>
          <style:tab-stop style:position="0.9984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960">
      <style:text-properties fo:color="#000000" fo:font-family="Gadugi" style:font-family-complex="Gadugi" fo:font-size="10pt" style:font-size-complex="10pt" fo:language="pt" style:language-complex="hi" fo:country="PT" style:country-complex="IN"/>
    </style:style>
    <style:style style:family="text" style:name="T961">
      <style:text-properties fo:color="#000000" fo:font-family="Gadugi" style:font-family-complex="Gadugi" fo:font-size="10pt" style:font-size-complex="10pt" fo:language="pt" style:language-complex="hi" fo:country="PT" style:country-complex="IN"/>
    </style:style>
    <style:style style:family="text" style:name="T962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167">
      <style:paragraph-properties fo:line-height="150%" fo:text-align="justify" fo:margin-left="4.001cm" fo:margin-right="1.603cm" fo:text-indent="0cm">
        <style:tab-stops>
          <style:tab-stop style:position="0.9984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963">
      <style:text-properties fo:color="#000000" fo:font-family="Gadugi" style:font-family-complex="Gadugi" fo:font-size="10pt" style:font-size-complex="10pt" fo:language="pt" style:language-complex="hi" fo:country="PT" style:country-complex="IN"/>
    </style:style>
    <style:style style:family="text" style:name="T964">
      <style:text-properties fo:color="#000000" fo:font-family="Gadugi" style:font-family-complex="Gadugi" fo:font-size="10pt" style:font-size-complex="10pt" fo:language="en" style:language-complex="ar" fo:country="US" style:country-complex="SA"/>
    </style:style>
    <style:style style:family="text" style:name="T965">
      <style:text-properties fo:color="#000000" fo:font-family="Gadugi" style:font-family-complex="Gadugi" fo:font-size="10pt" style:font-size-complex="10pt" fo:language="pt" style:language-complex="hi" fo:country="PT" style:country-complex="IN"/>
    </style:style>
    <style:style style:family="text" style:name="T966">
      <style:text-properties fo:color="#000000" fo:font-family="Gadugi" style:font-family-complex="Gadugi" fo:font-size="10pt" style:font-size-complex="10pt" fo:language="pt" style:language-complex="hi" fo:country="PT" style:country-complex="IN"/>
    </style:style>
    <style:style style:family="text" style:name="T967">
      <style:text-properties fo:color="#000000" fo:font-family="Gadugi" style:font-family-complex="Gadugi" fo:font-size="10pt" style:font-size-complex="10pt" fo:language="pt" style:language-complex="hi" fo:country="PT" style:country-complex="IN"/>
    </style:style>
    <style:style style:family="text" style:name="T968">
      <style:text-properties fo:color="#000000" fo:font-family="Gadugi" style:font-family-complex="Gadugi" fo:font-size="10pt" style:font-size-complex="10pt" fo:language="pt" style:language-complex="hi" fo:country="PT" style:country-complex="IN"/>
    </style:style>
    <style:style style:family="text" style:name="T969">
      <style:text-properties fo:color="#000000" fo:font-family="Gadugi" style:font-family-complex="Gadugi" fo:font-size="10pt" style:font-size-complex="10pt" fo:language="pt" style:language-complex="hi" fo:country="PT" style:country-complex="IN"/>
    </style:style>
    <style:style style:family="text" style:name="T970">
      <style:text-properties fo:color="#000000" fo:font-family="Gadugi" style:font-family-complex="Gadugi" fo:font-size="11pt" style:font-size-complex="11pt" fo:language="pt" style:language-complex="ar" fo:country="PT" style:country-complex="SA"/>
    </style:style>
    <style:style style:family="text" style:name="T971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168">
      <style:paragraph-properties fo:line-height="150%" fo:text-align="justify" fo:margin-left="4.001cm" fo:margin-right="1.603cm" fo:text-indent="0cm">
        <style:tab-stops>
          <style:tab-stop style:position="0.9984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972">
      <style:text-properties fo:color="#000000" fo:font-family="Tahoma" style:font-family-complex="Tahoma" fo:font-size="10pt" style:font-size-complex="10pt" fo:language="pt" style:language-complex="hi" fo:country="PT" style:country-complex="IN"/>
    </style:style>
    <style:style style:family="text" style:name="T973">
      <style:text-properties fo:color="#000000" fo:font-family="Tahoma" style:font-family-complex="Tahoma" fo:font-size="10pt" style:font-size-complex="10pt" fo:language="pt" style:language-complex="hi" fo:country="PT" style:country-complex="IN"/>
    </style:style>
    <style:style style:family="text" style:name="T974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169">
      <style:paragraph-properties fo:line-height="150%" fo:text-align="justify" fo:margin-left="4.001cm" fo:margin-right="1.603cm" fo:text-indent="0cm">
        <style:tab-stops>
          <style:tab-stop style:position="0.9984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975">
      <style:text-properties fo:color="#000000" fo:font-family="Tahoma" style:font-family-complex="Tahoma" fo:font-size="10pt" style:font-size-complex="10pt" fo:language="pt" style:language-complex="hi" fo:country="PT" style:country-complex="IN"/>
    </style:style>
    <style:style style:family="text" style:name="T976">
      <style:text-properties fo:color="#000000" fo:font-family="Tahoma" style:font-family-complex="Tahoma" fo:font-size="10pt" style:font-size-complex="10pt" fo:language="pt" style:language-complex="hi" fo:country="PT" style:country-complex="IN"/>
    </style:style>
    <style:style style:family="text" style:name="T977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170">
      <style:paragraph-properties fo:line-height="150%" fo:text-align="justify" fo:margin-left="4.001cm" fo:margin-right="1.603cm" fo:text-indent="2.748cm">
        <style:tab-stops>
          <style:tab-stop style:position="0.9984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978">
      <style:text-properties fo:color="#000000" fo:font-family="Tahoma" style:font-family-complex="Tahoma" fo:font-size="10pt" style:font-size-complex="10pt" fo:language="pt" style:language-complex="hi" fo:country="PT" style:country-complex="IN"/>
    </style:style>
    <style:style style:family="text" style:name="T979">
      <style:text-properties fo:color="#000000" fo:font-family="Tahoma" style:font-family-complex="Tahoma" fo:font-size="10pt" style:font-size-complex="10pt" fo:language="pt" style:language-complex="hi" fo:country="PT" style:country-complex="IN"/>
    </style:style>
    <style:style style:family="text" style:name="T980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171">
      <style:paragraph-properties fo:line-height="150%" fo:margin-left="0cm" fo:margin-right="1.603cm" fo:text-indent="2.748cm">
        <style:tab-stops>
          <style:tab-stop style:position="0.9984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981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Graphics" style:family="graphic" style:name="gr11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982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Graphics" style:family="graphic" style:name="gr12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983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984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172">
      <style:paragraph-properties fo:line-height="150%" fo:margin-left="0cm" fo:margin-right="0cm" fo:text-indent="2.748cm"/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985">
      <style:text-properties fo:color="#000000" fo:font-family="Tahoma" style:font-family-complex="Tahoma" fo:font-size="10pt" style:font-size-complex="10pt" fo:language="pt" style:language-complex="hi" fo:country="PT" style:country-complex="IN" fo:font-weight="bold"/>
    </style:style>
    <style:style style:family="text" style:name="T986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987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173">
      <style:paragraph-properties fo:line-height="150%" fo:margin-left="0cm" fo:margin-right="0cm" fo:text-indent="2.748cm"/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988">
      <style:text-properties fo:color="#000000" fo:font-family="Tahoma" style:font-family-complex="Tahoma" fo:font-size="10pt" style:font-size-complex="10pt" fo:language="pt" style:language-complex="hi" fo:country="PT" style:country-complex="IN" fo:font-weight="bold"/>
    </style:style>
    <style:style style:family="text" style:name="T989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990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174">
      <style:paragraph-properties fo:line-height="150%" fo:text-align="justify" fo:margin-left="4.001cm" fo:margin-right="1.603cm" fo:text-indent="2.748cm">
        <style:tab-stops>
          <style:tab-stop style:position="0.9984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991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992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993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175">
      <style:paragraph-properties fo:line-height="150%" fo:text-align="justify" fo:margin-left="1cm" fo:margin-right="0cm" fo:text-indent="1.997cm">
        <style:tab-stops>
          <style:tab-stop style:position="4.001cm" style:type="left"/>
        </style:tab-stops>
      </style:paragraph-properties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994">
      <style:text-properties fo:color="#000000" fo:font-family="Tahoma" style:font-family-complex="Tahoma" fo:font-size="10pt" style:font-size-complex="10pt" fo:language="pt" style:language-complex="ar" fo:country="PT" style:country-complex="SA"/>
    </style:style>
    <style:style style:family="text" style:name="T995">
      <style:text-properties fo:color="#000000" fo:font-family="Tahoma" style:font-family-complex="Tahoma" fo:font-size="10pt" style:font-size-complex="10pt" fo:language="pt" style:language-complex="ar" fo:country="PT" style:country-complex="SA"/>
    </style:style>
    <style:style style:family="text" style:name="T996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176">
      <style:paragraph-properties fo:line-height="150%" fo:text-align="justify" fo:margin-left="1cm" fo:margin-right="0cm" fo:text-indent="2.997cm"/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997">
      <style:text-properties fo:color="#000000" fo:font-family="Tahoma" style:font-family-complex="Tahoma" fo:font-size="10pt" style:font-size-complex="10pt" fo:language="pt" style:language-complex="ar" fo:country="PT" style:country-complex="SA"/>
    </style:style>
    <style:style style:family="text" style:name="T998">
      <style:text-properties fo:color="#000000" fo:font-family="Tahoma" style:font-family-complex="Tahoma" fo:font-size="10pt" style:font-size-complex="10pt" fo:language="pt" style:language-complex="ar" fo:country="PT" style:country-complex="SA"/>
    </style:style>
    <style:style style:family="text" style:name="T999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177">
      <style:paragraph-properties fo:line-height="150%" fo:text-align="justify" fo:margin-left="1cm" fo:margin-right="0cm" fo:text-indent="1.997cm"/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1000">
      <style:text-properties fo:color="#000000" fo:font-family="Tahoma" style:font-family-complex="Tahoma" fo:font-size="9pt" style:font-size-complex="9pt" fo:language="pt" style:language-complex="ar" fo:country="BR" style:country-complex="SA" fo:font-style="italic"/>
    </style:style>
    <style:style style:family="text" style:name="T1001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1002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parent-style-name="896" style:family="paragraph" style:name="P178">
      <style:paragraph-properties fo:line-height="150%" fo:text-align="justify" fo:margin-left="1cm" fo:margin-right="0cm" fo:text-indent="1.997cm"/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1003">
      <style:text-properties fo:color="#000000" fo:font-family="Tahoma" style:font-family-complex="Tahoma" fo:font-size="10pt" style:font-size-complex="10pt" fo:language="pt" style:language-complex="hi" fo:country="BR" style:country-complex="IN" fo:font-weight="bold"/>
    </style:style>
    <style:style style:family="text" style:name="T1004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  <style:style style:family="text" style:name="T1005">
      <style:text-properties fo:color="#000000" fo:font-family="Gill Sans MT" style:font-family-complex="Gill Sans MT" fo:font-size="11pt" style:font-size-complex="11pt" fo:language="pt" style:language-complex="ar" fo:country="PT" style:country-complex="SA"/>
    </style:style>
  </office:automatic-styles>
  <office:body>
    <office:text text:use-soft-page-breaks="true">
      <text:p text:style-name="P56"><text:span text:style-name="T484"/><text:span text:style-name="T485">EXCELENTÍSSIMO SENHOR DOUTOR DESEMBARGADOR DA EGRÉGIA SEGUNDA CÂMARA CÍVEL DO TRIBUNAL DE JUSTIÇA DO ESTADO DO RIO GRANDE DO SUL.</text:span><text:span text:style-name="T486"/><text:span text:style-name="T487"/></text:p>
      <text:p text:style-name="P57"><text:span text:style-name="T488"/><text:span text:style-name="T489"/><text:span text:style-name="T490"/></text:p>
      <text:p text:style-name="P58"><text:span text:style-name="T491"/><text:span text:style-name="T492"/><text:span text:style-name="T493"/></text:p>
      <text:p text:style-name="P59"><text:span text:style-name="T494"/><text:span text:style-name="T495"/><text:span text:style-name="T496"/></text:p>
      <text:p text:style-name="P60"><text:span text:style-name="T497">Autos n°:</text:span><text:span text:style-name="T498"><text:s/><text:tab/></text:span><text:span text:style-name="T499">5001804-71.2021.8.21.0049 (Originário)</text:span><text:span text:style-name="T500"/><text:span text:style-name="T501"/></text:p>
      <text:p text:style-name="P61"><text:span text:style-name="T502"/><text:span text:style-name="T503"/><text:span text:style-name="T504"/></text:p>
      <text:p text:style-name="P62"><text:span text:style-name="T505">Autos nº: <text:tab/>5001483-31.2024.8.21.0049 (Cumprimento de sentença)</text:span><text:span text:style-name="T506"/><text:span text:style-name="T507"/></text:p>
      <text:p text:style-name="P63"><text:span text:style-name="T508"/><text:span text:style-name="T509"/><text:span text:style-name="T510"/></text:p>
      <text:p text:style-name="P64"><text:span text:style-name="T511">Autos nº: <text:tab/>5300098-40.2025.8.21.7000 (Agravo de Instrumento)</text:span><text:span text:style-name="T512"/><text:span text:style-name="T513"/></text:p>
      <text:p text:style-name="P65"><text:span text:style-name="T514"/><text:span text:style-name="T515"/><text:span text:style-name="T516"/></text:p>
      <text:p text:style-name="P66"><text:span text:style-name="T517">Embargant</text:span><text:span text:style-name="T518">e:<text:s text:c="2"/><text:tab/></text:span><text:a xlink:href="javascript:exibirSubFrm(&amp;amp;apos;controlador.php?acao=processa_resultado_subfrm&amp;amp;amp;id_pessoa=11625529306438848259136087400&amp;amp;amp;num_processo=50014833120248210049&amp;amp;amp;hash=b1c3123e13722545060749cc114344a5&amp;amp;apos;);" xlink:type="simple"><text:span text:style-name="T519"/><text:span text:style-name="T520"/><text:span text:style-name="T521">R.A. MESQUITA DE ARAÚJO - MOVEIS E ESTOFADOS</text:span></text:a><text:span text:style-name="T522"/><text:span text:style-name="T523"/></text:p>
      <text:p text:style-name="P67"><text:span text:style-name="T524"/><text:span text:style-name="T525"/><text:span text:style-name="T526"/></text:p>
      <text:p text:style-name="P68"><text:span text:style-name="T527">Embargado</text:span><text:span text:style-name="T528">: <text:tab/></text:span><text:a xlink:href="javascript:exibirSubFrm(&amp;amp;apos;controlador.php?acao=processa_resultado_subfrm&amp;amp;amp;id_pessoa=11625529306438848259136087400&amp;amp;amp;num_processo=50014833120248210049&amp;amp;amp;hash=b1c3123e13722545060749cc114344a5&amp;amp;apos;);" xlink:type="simple"><text:span text:style-name="T529"/><text:span text:style-name="T530"/><text:span text:style-name="T531">H</text:span></text:a><text:span text:style-name="T532">DI Seguros </text:span><text:span text:style-name="T533">e MAICON DENTI </text:span><text:span text:style-name="T534"/><text:span text:style-name="T535"/></text:p>
      <text:p text:style-name="P69"><text:span text:style-name="T536"/><text:span text:style-name="T537"/><text:span text:style-name="T538"/></text:p>
      <text:p text:style-name="P70"><text:span text:style-name="T539"/><text:span text:style-name="T540"/><text:span text:style-name="T541"/></text:p>
      <text:p text:style-name="P71"><text:span text:style-name="T542"/><text:span text:style-name="T543"/><text:span text:style-name="T544"/></text:p>
      <text:p text:style-name="P72"><text:span text:style-name="T545"/><text:a xlink:href="javascript:exibirSubFrm(&amp;amp;apos;controlador.php?acao=processa_resultado_subfrm&amp;amp;amp;id_pessoa=11625529306438848259136087400&amp;amp;amp;num_processo=50014833120248210049&amp;amp;amp;hash=b1c3123e13722545060749cc114344a5&amp;amp;apos;);" xlink:type="simple"><text:span text:style-name="T546"/><text:span text:style-name="T547"/><text:span text:style-name="T548">R.A. MESQUITA DE ARAÚJO - MOVEIS E ESTOFADOS</text:span></text:a><text:span text:style-name="T549">, devidamente qualificada, por seu advogado devidamente constituído, nos autos do processo em epígrafe, vem respeitosamente perante Vossa Excelência,</text:span><text:span text:style-name="T550"><text:s/></text:span><text:span text:style-name="T551">opor os presentes</text:span><text:span text:style-name="T552"/><text:span text:style-name="T553"/></text:p>
      <text:p text:style-name="P73"><text:span text:style-name="T554"/><text:span text:style-name="T555"/><text:span text:style-name="T556"/></text:p>
      <text:p text:style-name="P74"><text:span text:style-name="T557"/><text:span text:style-name="T558">EMBARGOS DE DECLARAÇÃO</text:span><text:span text:style-name="T559"/><text:span text:style-name="T560"/></text:p>
      <text:p text:style-name="P75"><text:span text:style-name="T561"/><text:span text:style-name="T562"/><text:span text:style-name="T563"/></text:p>
      <text:p text:style-name="P76"><text:span text:style-name="T564">com fundamento no art</text:span><text:span text:style-name="T565">.</text:span><text:span text:style-name="T566"> 1.022, incisos I e II, do CPC</text:span><text:span text:style-name="T567">/2015</text:span><text:span text:style-name="T568">, em face do </text:span><text:span text:style-name="T569">r.</text:span><text:span text:style-name="T570"> Acórdão </text:span><text:span text:style-name="T571">(Ev. 26) </text:span><text:span text:style-name="T572">que deu provimento ao agravo de instrumento interposto pela ora Embargada.</text:span><text:span text:style-name="T573"/><text:span text:style-name="T574"/></text:p>
      <text:p text:style-name="P77"><text:span text:style-name="T575"/><text:span text:style-name="T576"/><text:span text:style-name="T577"/></text:p>
      <text:list>
        <text:list-item>
          <text:p text:style-name="P78"><text:span text:style-name="T578"/><text:span text:style-name="T579">DA TEMPESTIVIDAD</text:span><text:span text:style-name="T580">E</text:span><text:span text:style-name="T581"/><text:span text:style-name="T582"/></text:p>
        </text:list-item>
        <text:list-item>
          <text:p text:style-name="P79"><text:span text:style-name="T583"/><text:span text:style-name="T584"/><text:span text:style-name="T585"/></text:p>
        </text:list-item>
      </text:list>
      <text:p text:style-name="P80"><text:span text:style-name="T586">Inicialmente, cumpre salientar a manifesta tempestividade dos presentes embargos declaratórios. </text:span><text:span text:style-name="T587">O</text:span><text:span text:style-name="T588"> prazo legal de </text:span><text:span text:style-name="T589">0</text:span><text:span text:style-name="T590">5 (cinco) dias úteis para a oposição do presente recurso</text:span><text:span text:style-name="T591"> teve inicio no dia </text:span><text:span text:style-name="T592">23/02/206</text:span><text:span text:style-name="T593">, tendo como data final </text:span><text:span text:style-name="T594">27/02/2026</text:span><text:span text:style-name="T595">, conforme estabelece o art</text:span><text:span text:style-name="T596">.</text:span><text:span text:style-name="T597"> 1.023 do CPC/</text:span><text:span text:style-name="T598">2015</text:span><text:span text:style-name="T599">.</text:span><text:span text:style-name="T600"/><text:span text:style-name="T601"/></text:p>
      <text:p text:style-name="P81"><text:span text:style-name="T602"/><text:span text:style-name="T603"/><text:span text:style-name="T604"/></text:p>
      <text:list>
        <text:list-item>
          <text:p text:style-name="P82"><text:span text:style-name="T605"/><text:span text:style-name="T606">SÍNTESE PROCESSUAL E DO ACÓRDÃO EMBARGADO</text:span><text:span text:style-name="T607"/><text:span text:style-name="T608"/></text:p>
        </text:list-item>
        <text:list-item>
          <text:p text:style-name="P83"><text:span text:style-name="T609"/><text:span text:style-name="T610"/><text:span text:style-name="T611"/></text:p>
        </text:list-item>
      </text:list>
      <text:p text:style-name="P84"><text:span text:style-name="T612">O presente feito tem origem em ação de reparação de danos decorrentes de acidente de trânsito ocorrido em 23</text:span><text:span text:style-name="T613">/02/2021</text:span><text:span text:style-name="T614">. </text:span><text:span text:style-name="T615"/><text:span text:style-name="T616"/></text:p>
      <text:p text:style-name="P85"><text:span text:style-name="T617"/><text:span text:style-name="T618"/><text:span text:style-name="T619"/></text:p>
      <text:p text:style-name="P86"><text:span text:style-name="T620">A sentença de origem, mantida em sede recursal, condenou solidariamente a </text:span><text:span text:style-name="T621">ora Embargante</text:span><text:span text:style-name="T622">, R.A. Mesquita de Araujo – Móveis e Estofados, e a HDI Seguros S.A. ao conserto integral do caminhão do autor (orçamento mínimo de R$ 62.515,00) e ao</text:span><text:span text:style-name="T623"> pagamento de lucros cessantes de R$ 3.000,00 mensais, desde 23/02/2021 até o efetivo conserto, com correção pelo IGP-M e juros de 1% ao mês. </text:span><text:span text:style-name="T624"/><text:span text:style-name="T625"/></text:p>
      <text:p text:style-name="P87"><text:span text:style-name="T626"/><text:span text:style-name="T627"/><text:span text:style-name="T628"/></text:p>
      <text:p text:style-name="P88"><text:span text:style-name="T629">A responsabilidade da HDI foi expressamente limitada ao capital segurado na rubrica de danos materiais da apólice.</text:span><text:span text:style-name="T630"/><text:span text:style-name="T631"/></text:p>
      <text:p text:style-name="P89"><text:span text:style-name="T632"/><text:span text:style-name="T633"/><text:span text:style-name="T634"/></text:p>
      <text:p text:style-name="P90"><text:span text:style-name="T635">Na fase de cumprimento de sentença, a HDI apresentou impugnação alegando excesso de execução, sustentando ter realizado pagamentos administrativos relativos ao mes</text:span><text:span text:style-name="T636">mo sinistro — R$ 42.806,36 em 28/05/2021, R$ 7.060,00 em 02/06/2021 e R$ 15.000,00 em 08/09/2021, totalizando R$ 64.866,36 —, os quais, segundo a seguradora, deveriam ser abatidos do limite da apólice (R$ 150.000,00) para fins de apuração do saldo devedor.</text:span><text:span text:style-name="T637"/><text:span text:style-name="T638"/></text:p>
      <text:p text:style-name="P91"><text:span text:style-name="T639"/><text:span text:style-name="T640"/><text:span text:style-name="T641"/></text:p>
      <text:p text:style-name="P92"><text:span text:style-name="T642">O juízo de primeiro grau rejeitou a impugnação, acolhendo a tese de preclusão e inovação processual, por entender que tais pagamentos deveri</text:span><text:span text:style-name="T643">am ter sido informados e demonstrados durante a fase de conhecimento. </text:span><text:span text:style-name="T644"/><text:span text:style-name="T645"/></text:p>
      <text:p text:style-name="P93"><text:span text:style-name="T646"/><text:span text:style-name="T647"/><text:span text:style-name="T648"/></text:p>
      <text:p text:style-name="P94"><text:span text:style-name="T649">O v. acórdão ora embargado reformou essa decisão, dando provimento ao agravo da HDI e reconhecendo a possibilidade de abatimento dos pagamentos do teto da apólice na fase de cumprimento.</text:span><text:span text:style-name="T650"/><text:span text:style-name="T651"/></text:p>
      <text:p text:style-name="P95"><text:span text:style-name="T652"/><text:span text:style-name="T653"/><text:span text:style-name="T654"/></text:p>
      <text:p text:style-name="P96"><text:span text:style-name="T655">Ocorre que a decisão embargada incorre em </text:span><text:span text:style-name="T656">omissão, obscuridade e contradição</text:span><text:span text:style-name="T657"> que prejudicam diretamente a Embargante, impondo-se os presentes embargos nos termos do artigo 1.022 do CPC.</text:span><text:span text:style-name="T658"/><text:span text:style-name="T659"/></text:p>
      <text:list>
        <text:list-item>
          <text:p text:style-name="P97"><text:span text:style-name="T660"/><text:span text:style-name="T661"/><text:span text:style-name="T662"/></text:p>
        </text:list-item>
        <text:list-item>
          <text:p text:style-name="P98"><text:span text:style-name="T663"/><text:span text:style-name="T664">DAS RAZÕES </text:span><text:span text:style-name="T665">DO RECURSO</text:span><text:span text:style-name="T666"/><text:span text:style-name="T667"/></text:p>
        </text:list-item>
        <text:list-item>
          <text:p text:style-name="P99"><text:span text:style-name="T668"/><text:span text:style-name="T669"/><text:span text:style-name="T670"/></text:p>
        </text:list-item>
      </text:list>
      <text:p text:style-name="P100"><text:span text:style-name="T671">Os Embargos de Declaração constituem um instrumento processual de fundamental importância no sistema jurídico brasileiro, cuja finalidade primordial é aperfeiçoar a prestação jurisdicional, tornando-a clara, completa e coerente. </text:span><text:span text:style-name="T672"/><text:span text:style-name="T673"/></text:p>
      <text:p text:style-name="P101"><text:span text:style-name="T674"/><text:span text:style-name="T675"/><text:span text:style-name="T676"/></text:p>
      <text:p text:style-name="P102"><text:span text:style-name="T677">Conforme o disposto no art</text:span><text:span text:style-name="T678">.</text:span><text:span text:style-name="T679"> 1.022 do CPC</text:span><text:span text:style-name="T680">/2015</text:span><text:span text:style-name="T681">, cabem embargos de declaração contra qualquer decisão judicial para "esclarecer obscuridade ou eliminar contradição", "</text:span><text:span text:style-name="T682">suprir omissão de ponto ou questão sobre o qual devia se pronunciar o juiz de ofício ou a requerimen</text:span><text:span text:style-name="T683">to</text:span><text:span text:style-name="T684">", ou para "corrigir erro material". </text:span><text:span text:style-name="T685">As questões a seguir detalhadas demonstram a imperiosa necessidade de acolhimento destes </text:span><text:span text:style-name="T686">embargos.</text:span><text:span text:style-name="T687"/><text:span text:style-name="T688"/></text:p>
      <text:p text:style-name="P103"><text:span text:style-name="T689"/><text:span text:style-name="T690"/><text:span text:style-name="T691"/></text:p>
      <text:p text:style-name="P104"><text:span text:style-name="T692">DA OMISSÃO</text:span><text:span text:style-name="T693"/><text:span text:style-name="T694"/></text:p>
      <text:p text:style-name="P105"><text:span text:style-name="T695">Ausência de pronunciamento sobre os direitos da embargante como parte solidária</text:span><text:span text:style-name="T696"/><text:span text:style-name="T697"/></text:p>
      <text:p text:style-name="P106"><text:span text:style-name="T698">A decisão embargada, ao reformar o entendimento do juízo de origem e reconhecer o excesso de execução em favor da HDI, determinou o prosseguimento do feito pelo saldo remanescente da apólice após os abatimentos. </text:span><text:span text:style-name="T699"/><text:span text:style-name="T700"/></text:p>
      <text:p text:style-name="P107"><text:span text:style-name="T701">Contudo, </text:span><text:span text:style-name="T702">quedou-se silente quanto às consequências jurídicas dessa reforma para a Embargante</text:span><text:span text:style-name="T703">, que figura como corré solidária no cumprimento de sentença e que, por força da condenação, responde integralmente pelas obrigações fixadas no título executivo.</text:span><text:span text:style-name="T704"/><text:span text:style-name="T705"/></text:p>
      <text:p text:style-name="P108"><text:span text:style-name="T706">Com a limitação da responsabilidade da HDI ao saldo residual da apólice,</text:span><text:span text:style-name="T707"><text:s/></text:span><text:span text:style-name="T708">a diferença entre o total da condenação atualizada e o montante coberto pela seguradora recairá integralmente sobre a Embargante</text:span><text:span text:style-name="T709">, microempresa de porte limitado, sem capacidade financeira para suportar tal ônus — f</text:span><text:span text:style-name="T710">ato este amplamente demonstrado nas contrarrazões apresentadas ao agravo de instrumento. </text:span><text:span text:style-name="T711"/><text:span text:style-name="T712"/></text:p>
      <text:p text:style-name="P109"><text:span text:style-name="T713">O v. acórdão não explicitou qual o montante que permanece exigível da Embargante, nem definiu como a obrigação residual será distribuída entre os devedores solidários.</text:span><text:span text:style-name="T714"><text:s/></text:span><text:span text:style-name="T715"/><text:span text:style-name="T716">Tal omissão viola o artigo 489, §1º, incisos II e IV, do CPC, impondo-se que o v. acórdão </text:span><text:span text:style-name="T717">esclareça expressamente</text:span><text:span text:style-name="T718">: </text:span><text:span text:style-name="T719"/><text:span text:style-name="T720"/><text:span text:style-name="T721"/></text:p>
      <text:p text:style-name="P110"><text:span text:style-name="T722"/><text:span text:style-name="T723"/><text:span text:style-name="T724"/></text:p>
      <text:p text:style-name="P111"><text:span text:style-name="T725">(a) se, o saldo remanescente da condenação após o abatimento dos valores pagos pela HDI é integralmente exigível da Embargante; e </text:span><text:span text:style-name="T726"/><text:span text:style-name="T727"/></text:p>
      <text:p text:style-name="P112"><text:span text:style-name="T728">(b) qual o critério de imputação da obrigação residual entre os devedores solidários.</text:span><text:span text:style-name="T729"/><text:span text:style-name="T730"/></text:p>
      <text:p text:style-name="P113"><text:span text:style-name="T731"/><text:span text:style-name="T732"/><text:span text:style-name="T733"/></text:p>
      <text:p text:style-name="P114"><text:span text:style-name="T734">OMISSÃO QUANTO À OBRIGAÇÃO DE FAZER E AOS LUCROS CESSANTES EM CURSO</text:span><text:span text:style-name="T735"/><text:span text:style-name="T736"/></text:p>
      <text:p text:style-name="P115"><text:span text:style-name="T737"/><text:span text:style-name="T738"/><text:span text:style-name="T739"/></text:p>
      <text:p text:style-name="P116"><text:span text:style-name="T740">O título executivo impõe obrigação de conserto do veículo, que até a presente data não foi realizado. </text:span><text:span text:style-name="T741"/><text:span text:style-name="T742"/></text:p>
      <text:p text:style-name="P117"><text:span text:style-name="T743">Os lucros cessantes, fixados em R$3.000,00 mensais desde fevereiro de 2021, </text:span><text:span text:style-name="T744">continuam se acumulando,</text:span><text:span text:style-name="T745"> superando </text:span><text:span text:style-name="T746">R$ 191.656,26 brutos</text:span><text:span text:style-name="T747">, em decorrência da inércia da própria Seguradora em não autorizar ou custear o reparo do bem.</text:span><text:span text:style-name="T748"/><text:span text:style-name="T749"/></text:p>
      <text:p text:style-name="P118"><text:span text:style-name="T750"/><text:span text:style-name="T751"/><text:span text:style-name="T752"/></text:p>
      <text:p text:style-name="P119"><text:span text:style-name="T753">O v. acórdão é omisso quanto à seguinte questão essencial: </text:span><text:span text:style-name="T754">se o saldo remanescente da apólice, após os abatimentos ora reconhecidos, é suficiente para custear o conserto integral do veículo</text:span><text:span text:style-name="T755"> — atualizado para aproximadamente R$95.636,00 —, e de que forma a Embargante ficará desobrigada da obrigação solidária de reparo caso a HDI, dentro do saldo residual, efetue o conserto. </text:span><text:span text:style-name="T756"/><text:span text:style-name="T757"/></text:p>
      <text:p text:style-name="P120"><text:span text:style-name="T758"/><text:span text:style-name="T759"/><text:span text:style-name="T760"/></text:p>
      <text:p text:style-name="P121"><text:span text:style-name="T761">A omissão gera insegurança jurídica irreparável para a Embargante.</text:span><text:span text:style-name="T762"/><text:span text:style-name="T763"/></text:p>
      <text:p text:style-name="P122"><text:span text:style-name="T764"/><text:span text:style-name="T765"/><text:span text:style-name="T766"/></text:p>
      <text:p text:style-name="P123"><text:span text:style-name="T767">DA OBSCURIDADE</text:span><text:span text:style-name="T768"/><text:span text:style-name="T769"/></text:p>
      <text:p text:style-name="P124"><text:span text:style-name="T770"/><text:span text:style-name="T771"/><text:span text:style-name="T772"/></text:p>
      <text:p text:style-name="P125"><text:span text:style-name="T773">OBSCURIDADE QUANTO À SUPERAÇÃO DA PRECLUSÃO: INSUFICIÊNCIA DA FUNDAMENTAÇÃO</text:span><text:span text:style-name="T774"/><text:span text:style-name="T775"/></text:p>
      <text:p text:style-name="P126"><text:span text:style-name="T776">O ponto central da controvérsia resolvida</text:span><text:span text:style-name="T777"> pelo v. acórdão consiste em saber se é admissível, na fase de cumprimento de sentença, a demonstração de pagamentos administrativos que não foram informados nem comprovados durante toda a fase de conhecimento. </text:span><text:span text:style-name="T778"/><text:span text:style-name="T779"/></text:p>
      <text:p text:style-name="P127"><text:span text:style-name="T780">O v. acórdão concluiu que sim, afirmando que </text:span><text:span text:style-name="T781">"</text:span><text:span text:style-name="T782">a apuração do quantum debeatur é matéria própria da fase de cumprimento de sentença</text:span><text:span text:style-name="T783">"</text:span><text:span text:style-name="T784"> e que tal demonstração </text:span><text:span text:style-name="T785">"</text:span><text:span text:style-name="T786">não se confunde com a tentativa de alteração dos critérios de fundo do julgamento</text:span><text:span text:style-name="T787">"</text:span><text:span text:style-name="T788">.</text:span><text:span text:style-name="T789"/><text:span text:style-name="T790"/></text:p>
      <text:p text:style-name="P128"><text:span text:style-name="T791">Contudo, o v. acórdão é </text:span><text:span text:style-name="T792">obscuro</text:span><text:span text:style-name="T793"> ao não delimitar, com clareza suficiente, </text:span><text:span text:style-name="T794">por qual razão jurídica os pagamentos não precisavam ter sido informados durante a fase de conhecimento</text:span><text:span text:style-name="T795">,</text:span><text:span text:style-name="T796"> ainda que já fossem plenamente conhecidos da seguradora desde o momento em que foram realizados — todos entre maio e setembro de 2021, portanto anos antes da prolação da sentença (13/05/2023) e do acórdão de apelação.</text:span><text:span text:style-name="T797"/><text:span text:style-name="T798"/></text:p>
      <text:p text:style-name="P129"><text:span text:style-name="T799">É pacífico no sistema processual civil que </text:span><text:span text:style-name="T800">a preclusão consumativa</text:span><text:span text:style-name="T801"> impede a parte de t</text:span><text:span text:style-name="T802">razer ao processo fatos e alegações que poderia — e deveria — ter apresentado em momento processual anterior, nos termos do artigo 507 do CPC/2015.</text:span><text:span text:style-name="T803"/><text:span text:style-name="T804"/></text:p>
      <text:p text:style-name="P130"><text:span text:style-name="T805">Os pagamentos em tela foram realizados extrajudicialmente pela própria HDI, eram de seu exclusivo conhecimento e </text:span><text:span text:style-name="T806">nada obstava que fossem alegados e comprovados na contestação, nos embargos de declaração ou nas razões de apelação</text:span><text:span text:style-name="T807">. </text:span><text:span text:style-name="T808"/><text:span text:style-name="T809"/></text:p>
      <text:p text:style-name="P131"><text:span text:style-name="T810">A seguradora optou por silenciar sobre eles durante toda a fase de conhecimento, deixando o processo tramitar por anos sem que o juízo soubesse da existência desses pagamentos.</text:span><text:span text:style-name="T811"/><text:span text:style-name="T812"/></text:p>
      <text:p text:style-name="P132"><text:span text:style-name="T813">A distinção traçada pelo v. acórdão entre </text:span><text:span text:style-name="T814">"</text:span><text:span text:style-name="T815">rediscutir o mérito da condenação"</text:span><text:span text:style-name="T816"> e </text:span><text:span text:style-name="T817">"demonstrar o exato cumprimento da obrigação dentro do limite fixado</text:span><text:span text:style-name="T818">"</text:span><text:span text:style-name="T819"> é pertinente em abstrato, mas </text:span><text:span text:style-name="T820">não está suficientemente fundamentada no caso concreto</text:span><text:span text:style-name="T821">. </text:span><text:span text:style-name="T822"/><text:span text:style-name="T823"/></text:p>
      <text:p text:style-name="P133"><text:span text:style-name="T824">Afinal, o abatimento dos pagamentos administrativos do teto da apólice altera substancialmente o valor que a seguradora deve ao exequente</text:span><text:span text:style-name="T825"> — e portanto o valor exigível da Embargante —, o que se assemelha materialmente a uma rediscussão do conteúdo obrigacional que deveria ter sido travada durante a fase de conhecimento, quando todos os interessados poderiam debatê-la em contraditório pleno.</text:span><text:span text:style-name="T826"/><text:span text:style-name="T827"/></text:p>
      <text:p text:style-name="P134"><text:span text:style-name="T828">Reside aqui a obscuridade: o acórdão </text:span><text:span text:style-name="T829">não esclareceu o critério distintivo</text:span><text:span text:style-name="T830"> entre</text:span><text:span text:style-name="T831"><text:s/></text:span><text:span text:style-name="T832"/><text:span text:style-name="T833"/></text:p>
      <text:p text:style-name="P135"><text:span text:style-name="T834">(i) fatos supervenientes ao trânsito em julgado, que legitimamente podem ser demonstrados na fase executiva, e </text:span><text:span text:style-name="T835"/><text:span text:style-name="T836"/></text:p>
      <text:p text:style-name="P136"><text:span text:style-name="T837"/><text:span text:style-name="T838"/><text:span text:style-name="T839"/></text:p>
      <text:p text:style-name="P137"><text:span text:style-name="T840">(ii) fatos pretéritos e conhecidos da parte — como estes pagamentos —, que deveriam ter integrado a fase de conhecimento sob pena de preclusão. </text:span><text:span text:style-name="T841"/><text:span text:style-name="T842"/><text:span text:style-name="T843"/></text:p>
      <text:p text:style-name="P138"><text:span text:style-name="T844"/><text:span text:style-name="T845"/><text:span text:style-name="T846"/></text:p>
      <text:p text:style-name="P139"><text:span text:style-name="T847"/><text:span text:style-name="T848">Sem esse esclarecimento, a decisão cria precedente de ampla abertura para que devedores se valham de fatos deliberadamente ocultados durante a fase cognitiva para reduzir suas obrigações na execução, em prejuízo do credor e dos demais devedores solidários.</text:span><text:span text:style-name="T849"/><text:span text:style-name="T850"/></text:p>
      <text:p text:style-name="P140"><text:span text:style-name="T851">Impõe-se, portanto, que o v. acórdão </text:span><text:span text:style-name="T852">esclareça expressamente</text:span><text:span text:style-name="T853">: </text:span><text:span text:style-name="T854"/><text:span text:style-name="T855"/></text:p>
      <text:p text:style-name="P141"><text:span text:style-name="T856">(a) qual é o fundamento jurídico que permite a superação da preclusão para fatos que, embora anteriores ao trânsito em julgado, não foram informados nem d</text:span><text:span text:style-name="T857">iscutidos durante a fase de conhecimento por escolha da própria parte; e</text:span><text:span text:style-name="T858"/><text:span text:style-name="T859"/></text:p>
      <text:p text:style-name="P142"><text:span text:style-name="T860">(b) se essa permissividade se aplica indistintamente a qualquer fato pretérito ou apenas àqueles que, por sua natureza, não poderiam razoavelmente ter sido alegados na fase cognitiva.</text:span><text:span text:style-name="T861"/><text:span text:style-name="T862"/></text:p>
      <text:p text:style-name="P143"><text:span text:style-name="T863">Obscuridade quanto aos critérios de apuração do saldo remanescente</text:span><text:span text:style-name="T864"/><text:span text:style-name="T865"/></text:p>
      <text:p text:style-name="P144"><text:span text:style-name="T866">O v. acórdão determinou que </text:span><text:span text:style-name="T867">"a apuração contábil precisa de tais valores e do saldo remanescente deverá ser realizada pelo juízo de origem"</text:span><text:span text:style-name="T868">, sem, contudo, </text:span><text:span text:style-name="T869">fixar os parâmetros jurídicos que deverão orientar essa apuração</text:span><text:span text:style-name="T870">. </text:span><text:span text:style-name="T871"/><text:span text:style-name="T872"/></text:p>
      <text:p text:style-name="P145"><text:span text:style-name="T873">A obscuridade se manifesta nos seguintes pontos:</text:span><text:span text:style-name="T874"/><text:span text:style-name="T875"/></text:p>
      <text:p text:style-name="P146"><text:span text:style-name="T876">(a) </text:span><text:span text:style-name="T877">Se os valores pagos administrativamente devem ser abatidos do </text:span><text:span text:style-name="T878">valor nominal original da apólice (R$150.000,00) ou do valor já corrigido monetariamente</text:span><text:span text:style-name="T879">, uma vez que o próprio acórdão determinou a aplicação da Súmula 632 do STJ, segundo a qual a correção monetária incide desde a data de contratação do seguro;</text:span><text:span text:style-name="T880"/><text:span text:style-name="T881"/></text:p>
      <text:p text:style-name="P147"><text:span text:style-name="T882">(b) </text:span><text:span text:style-name="T883">Se os pagamentos a </text:span><text:span text:style-name="T884">terceiros</text:span><text:span text:style-name="T885"> (conserto do veículo de outra pessoa jurídica envolvida no acidente — Space Cabines 323 Ltda ME) e o pagamento a título de </text:span><text:span text:style-name="T886">reembolso de honorários advocatícios</text:span><text:span text:style-name="T887"> da segurada são efetivamente imputáveis à rubrica de </text:span><text:span text:style-name="T888">"Danos Materiais"</text:span><text:span text:style-name="T889"> da apólice — que é a cobertura expressamente limitada pela sentença —, ou se correspondem a coberturas diversas, hipótese em que não poderiam ser abatidos do teto aplicável à condenação;</text:span><text:span text:style-name="T890"/><text:span text:style-name="T891"/></text:p>
      <text:p text:style-name="P148"><text:span text:style-name="T892">(c) </text:span><text:span text:style-name="T893">Qual o </text:span><text:span text:style-name="T894">índice de correção monetária</text:span><text:span text:style-name="T895"> aplicável sobre o valor da a</text:span><text:span text:style-name="T896">pólice — se o índice contratual (não especificado nos autos) ou o IPCA (mencionado como supletivo no acórdão) — e a partir de que data-base incide a correção sobre o saldo após os abatimentos, considerando que cada pagamento foi realizado em data distinta.</text:span><text:span text:style-name="T897"/><text:span text:style-name="T898"/></text:p>
      <text:p text:style-name="P149"><text:span text:style-name="T899">A ausência desses parâmetros prejudica diretamente a Embargante, que poderá ser responsabilizada por valor residual sem que se saiba exatamente qual é esse valor e como foi calculado.</text:span><text:span text:style-name="T900"/><text:span text:style-name="T901"/></text:p>
      <text:p text:style-name="P150"><text:span/><text:span/></text:p>
      <text:list>
        <text:list-item>
          <text:p text:style-name="P151"><text:span text:style-name="T902"/><text:span text:style-name="T903">DOS PEDIDOS</text:span><text:span text:style-name="T904"/><text:span text:style-name="T905"/></text:p>
        </text:list-item>
        <text:list-item>
          <text:p text:style-name="P152"><text:span text:style-name="T906"/><text:span text:style-name="T907"/><text:span text:style-name="T908"/></text:p>
        </text:list-item>
      </text:list>
      <text:p text:style-name="P153"><text:span text:style-name="T909">Ante o exposto, a Embargante requer que estes </text:span><text:span text:style-name="T910">Embargos de Declaração</text:span><text:span text:style-name="T911"> sejam conhecidos e </text:span><text:span text:style-name="T912">providos</text:span><text:span text:style-name="T913">, com a atribuição de </text:span><text:span text:style-name="T914">efeitos infringentes</text:span><text:span text:style-name="T915">, para:</text:span><text:span text:style-name="T916"/><text:span text:style-name="T917"/></text:p>
      <text:p text:style-name="P154"><text:span text:style-name="T918"/><text:span text:style-name="T919"/><text:span text:style-name="T920"/></text:p>
      <text:p text:style-name="P155"><text:span text:style-name="T921">a) Omissão (art. 1.022, II, CPC): </text:span><text:span text:style-name="T922">que o v. acórdão explicite os efeitos da reforma em relação à Embargante R.A. Mesquita de Araujo, definindo se o saldo remanescente da condenaçã</text:span><text:span text:style-name="T923">o é exigível integralmente da Embargante e em qual montante; e se a obrigação de fazer (conserto do veículo) permanece exigível solidariamente e de que forma a Embargante se desonera desta parcela caso a HDI efetue o reparo com o saldo residual da apólice;</text:span><text:span text:style-name="T924"/><text:span text:style-name="T925"/></text:p>
      <text:p text:style-name="P156"><text:span text:style-name="T926"/><text:span text:style-name="T927"/><text:span text:style-name="T928"/></text:p>
      <text:p text:style-name="P157"><text:span text:style-name="T929">b) Obscuridade – preclusão (art. 1.022, I, CPC): </text:span><text:span text:style-name="T930">que o v. acórdão esclareça o fundamento jurídico que permite a superação da preclusão em relação a fatos pretéritos e plenamente conhecidos da seguradora desde o momento em que foram realizados (2021), que poderi</text:span><text:span text:style-name="T931">am e deveriam ter sido informados durante a fase de conhecimento, sob pena de preclusão consumativa (art. 507, CPC), delimitando o critério distintivo entre fatos que legitimamente podem ser trazidos na fase executiva e aqueles que se submetem à preclusão;</text:span><text:span text:style-name="T932"/><text:span text:style-name="T933"/></text:p>
      <text:p text:style-name="P158"><text:span text:style-name="T934"/><text:span text:style-name="T935"/><text:span text:style-name="T936"/></text:p>
      <text:p text:style-name="P159"><text:span text:style-name="T937">c) Obscuridade – critérios contábeis (art. 1.022, I, CPC): </text:span><text:span text:style-name="T938">que o v. acórdão estabeleça os parâmetros de apuração do saldo remanescente, esclarecendo: </text:span><text:span text:style-name="T939"/><text:span text:style-name="T940"/></text:p>
      <text:p text:style-name="P160"><text:span text:style-name="T941">(i) se o abatimento incide sobre o valor </text:span><text:span text:style-name="T942">nominal ou corrigido da apólice;</text:span><text:span text:style-name="T943"/><text:span text:style-name="T944"/></text:p>
      <text:p text:style-name="P161"><text:span text:style-name="T945">(ii) se os pagamentos realizados a terceiro e a título de honorários advocatícios da segurada são imputáveis especificamente à rubrica de Danos Materiais; e </text:span><text:span text:style-name="T946"/><text:span text:style-name="T947"/></text:p>
      <text:p text:style-name="P162"><text:span text:style-name="T948">(iii) qual o índice e a data-base de correção monetária aplicável;</text:span><text:span text:style-name="T949"/><text:span text:style-name="T950"/></text:p>
      <text:p text:style-name="P163"><text:span text:style-name="T951"/><text:span text:style-name="T952"/><text:span text:style-name="T953"/></text:p>
      <text:p text:style-name="P164"><text:span text:style-name="T954"/><text:span text:style-name="T955"/><text:span text:style-name="T956"/></text:p>
      <text:p text:style-name="P165"><text:span text:style-name="T957">Nestes termos, pede deferimento.</text:span><text:span text:style-name="T958"/><text:span text:style-name="T959"/></text:p>
      <text:p text:style-name="P166"><text:span text:style-name="T960"/><text:span text:style-name="T961"/><text:span text:style-name="T962"/></text:p>
      <text:p text:style-name="P167"><text:span text:style-name="T963">Blumenau, </text:span><text:span text:style-name="T964">25</text:span><text:span text:style-name="T965"> de </text:span><text:span text:style-name="T966">fevereiro</text:span><text:span text:style-name="T967"> de 202</text:span><text:span text:style-name="T968">6</text:span><text:span text:style-name="T969">. </text:span><text:span text:style-name="T970"/><text:span text:style-name="T971"/></text:p>
      <text:p text:style-name="P168"><text:span text:style-name="T972"/><text:span text:style-name="T973"/><text:span text:style-name="T974"/></text:p>
      <text:p text:style-name="P169"><text:span text:style-name="T975"/><text:span text:style-name="T976"/><text:span text:style-name="T977"/></text:p>
      <text:p text:style-name="P170"><text:span text:style-name="T978"/><text:span text:style-name="T979"/><text:span text:style-name="T980"/></text:p>
      <text:p text:style-name="P171"><text:span text:style-name="T981"/><text:span/><draw:frame draw:name="Imagem 8" draw:style-name="gr11" text:anchor-type="as-char" svg:width="4.339cm" svg:height="2.275cm" svg:x="0cm" svg:y="0cm"><draw:image xlink:href="Pictures/image5.png" xlink:type="simple" xlink:show="embed" xlink:actuate="onLoad"/></draw:frame><text:span text:style-name="T982"><text:tab/><text:tab/><text:tab/></text:span><text:span/><draw:frame draw:name="Imagem 7" draw:style-name="gr12" text:anchor-type="as-char" svg:width="4.419cm" svg:height="1.773cm" svg:x="0cm" svg:y="0cm"><draw:image xlink:href="Pictures/image6.png" xlink:type="simple" xlink:show="embed" xlink:actuate="onLoad"/></draw:frame><text:span text:style-name="T983"/><text:span text:style-name="T984"/></text:p>
      <text:p text:style-name="P172"><text:span text:style-name="T985">RODRIGO GONÇALVES <text:tab/><text:tab/><text:tab/>SANDRA CRISTINA OTTO</text:span><text:span text:style-name="T986"/><text:span text:style-name="T987"/></text:p>
      <text:p text:style-name="P173"><text:span text:style-name="T988">OAB/SC 29322<text:tab/><text:tab/><text:tab/><text:tab/>OAB/SC 61984</text:span><text:span text:style-name="T989"/><text:span text:style-name="T990"/></text:p>
      <text:p text:style-name="P174"><text:span text:style-name="T991"/><text:span text:style-name="T992"/><text:span text:style-name="T993"/></text:p>
      <text:p text:style-name="P175"><text:span text:style-name="T994"/><text:span text:style-name="T995"/><text:span text:style-name="T996"/></text:p>
      <text:p text:style-name="P176"><text:span text:style-name="T997"/><text:span text:style-name="T998"/><text:span text:style-name="T999"/></text:p>
      <text:p text:style-name="P177"><text:span text:style-name="T1000"/><text:span text:style-name="T1001"/><text:span text:style-name="T1002"/></text:p>
      <text:p text:style-name="P178"><text:span text:style-name="T1003"/><text:span text:style-name="T1004"/><text:span text:style-name="T100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9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841">
      <style:paragraph-properties/>
      <style:text-properties fo:font-size="10pt"/>
    </style:style>
    <style:style style:display-name="DStyle_text" style:family="text" style:name="842">
      <style:paragraph-properties/>
    </style:style>
    <style:style style:class="default" style:display-name="Normal" style:family="paragraph" style:name="843">
      <style:paragraph-properties/>
      <style:text-properties/>
    </style:style>
    <style:style style:parent-style-name="843" style:display-name="Heading 6" style:family="paragraph" style:name="844">
      <style:paragraph-properties fo:margin-top="2pt" fo:margin-bottom="0pt"/>
      <style:text-properties fo:color="#595959" fo:font-family="Arial" style:font-family-complex="Arial" fo:font-style="italic"/>
    </style:style>
    <style:style style:parent-style-name="843" style:display-name="Heading 7" style:family="paragraph" style:name="845">
      <style:paragraph-properties fo:margin-top="2pt" fo:margin-bottom="0pt"/>
      <style:text-properties fo:color="#595959" fo:font-family="Arial" style:font-family-complex="Arial"/>
    </style:style>
    <style:style style:parent-style-name="843" style:display-name="Heading 8" style:family="paragraph" style:name="846">
      <style:paragraph-properties fo:margin-bottom="0pt"/>
      <style:text-properties fo:color="#272727" fo:font-family="Arial" style:font-family-complex="Arial" fo:font-style="italic"/>
    </style:style>
    <style:style style:parent-style-name="843" style:display-name="Heading 9" style:family="paragraph" style:name="847">
      <style:paragraph-properties fo:margin-bottom="0pt"/>
      <style:text-properties fo:color="#272727" fo:font-family="Arial" style:font-family-complex="Arial" fo:font-style="italic"/>
    </style:style>
    <style:style style:parent-style-name="921" style:display-name="Heading 1 Char" style:family="text" style:name="848">
      <style:paragraph-properties/>
      <style:text-properties fo:color="#0f4761" fo:font-family="Arial" style:font-family-complex="Arial" fo:font-size="20pt" style:font-size-complex="20pt"/>
    </style:style>
    <style:style style:parent-style-name="921" style:display-name="Heading 2 Char" style:family="text" style:name="849">
      <style:paragraph-properties/>
      <style:text-properties fo:color="#0f4761" fo:font-family="Arial" style:font-family-complex="Arial" fo:font-size="16pt" style:font-size-complex="16pt"/>
    </style:style>
    <style:style style:parent-style-name="921" style:display-name="Heading 3 Char" style:family="text" style:name="850">
      <style:paragraph-properties/>
      <style:text-properties fo:color="#0f4761" fo:font-family="Arial" style:font-family-complex="Arial" fo:font-size="14pt" style:font-size-complex="14pt"/>
    </style:style>
    <style:style style:parent-style-name="921" style:display-name="Heading 4 Char" style:family="text" style:name="851">
      <style:paragraph-properties/>
      <style:text-properties fo:color="#0f4761" fo:font-family="Arial" style:font-family-complex="Arial" fo:font-style="italic"/>
    </style:style>
    <style:style style:parent-style-name="921" style:display-name="Heading 5 Char" style:family="text" style:name="852">
      <style:paragraph-properties/>
      <style:text-properties fo:color="#0f4761" fo:font-family="Arial" style:font-family-complex="Arial"/>
    </style:style>
    <style:style style:parent-style-name="921" style:display-name="Heading 6 Char" style:family="text" style:name="853">
      <style:paragraph-properties/>
      <style:text-properties fo:color="#595959" fo:font-family="Arial" style:font-family-complex="Arial" fo:font-style="italic"/>
    </style:style>
    <style:style style:parent-style-name="921" style:display-name="Heading 7 Char" style:family="text" style:name="854">
      <style:paragraph-properties/>
      <style:text-properties fo:color="#595959" fo:font-family="Arial" style:font-family-complex="Arial"/>
    </style:style>
    <style:style style:parent-style-name="921" style:display-name="Heading 8 Char" style:family="text" style:name="855">
      <style:paragraph-properties/>
      <style:text-properties fo:color="#272727" fo:font-family="Arial" style:font-family-complex="Arial" fo:font-style="italic"/>
    </style:style>
    <style:style style:parent-style-name="921" style:display-name="Heading 9 Char" style:family="text" style:name="856">
      <style:paragraph-properties/>
      <style:text-properties fo:color="#272727" fo:font-family="Arial" style:font-family-complex="Arial" fo:font-style="italic"/>
    </style:style>
    <style:style style:parent-style-name="843" style:display-name="Title" style:family="paragraph" style:name="857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921" style:display-name="Title Char" style:family="text" style:name="858">
      <style:paragraph-properties/>
      <style:text-properties fo:font-family="Arial" style:font-family-complex="Arial" fo:font-size="28pt" style:font-size-complex="28pt" fo:letter-spacing="-0.5pt"/>
    </style:style>
    <style:style style:parent-style-name="843" style:display-name="Subtitle" style:family="paragraph" style:name="859">
      <style:paragraph-properties/>
      <style:text-properties fo:color="#595959" fo:font-size="14pt" style:font-size-complex="14pt" fo:letter-spacing="0.75pt"/>
    </style:style>
    <style:style style:parent-style-name="921" style:display-name="Subtitle Char" style:family="text" style:name="860">
      <style:paragraph-properties/>
      <style:text-properties fo:color="#595959" fo:font-size="14pt" style:font-size-complex="14pt" fo:letter-spacing="0.75pt"/>
    </style:style>
    <style:style style:parent-style-name="921" style:display-name="Quote Char" style:family="text" style:name="861">
      <style:paragraph-properties/>
      <style:text-properties fo:color="#404040" fo:font-style="italic"/>
    </style:style>
    <style:style style:parent-style-name="921" style:display-name="Intense Emphasis" style:family="text" style:name="862">
      <style:paragraph-properties/>
      <style:text-properties fo:color="#0f4761" fo:font-style="italic"/>
    </style:style>
    <style:style style:parent-style-name="843" style:display-name="Intense Quote" style:family="paragraph" style:name="863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921" style:display-name="Intense Quote Char" style:family="text" style:name="864">
      <style:paragraph-properties/>
      <style:text-properties fo:color="#0f4761" fo:font-style="italic"/>
    </style:style>
    <style:style style:parent-style-name="921" style:display-name="Intense Reference" style:family="text" style:name="865">
      <style:paragraph-properties/>
      <style:text-properties fo:font-variant="small-caps" fo:color="#0f4761" fo:letter-spacing="0.25pt" fo:font-weight="bold"/>
    </style:style>
    <style:style style:parent-style-name="843" style:display-name="No Spacing" style:family="paragraph" style:name="866">
      <style:paragraph-properties fo:line-height="100%" fo:margin-bottom="0pt"/>
    </style:style>
    <style:style style:parent-style-name="921" style:display-name="Subtle Emphasis" style:family="text" style:name="867">
      <style:paragraph-properties/>
      <style:text-properties fo:color="#404040" fo:font-style="italic"/>
    </style:style>
    <style:style style:parent-style-name="921" style:display-name="Emphasis" style:family="text" style:name="868">
      <style:paragraph-properties/>
      <style:text-properties fo:font-style="italic"/>
    </style:style>
    <style:style style:parent-style-name="921" style:display-name="Strong" style:family="text" style:name="869">
      <style:paragraph-properties/>
      <style:text-properties fo:font-weight="bold"/>
    </style:style>
    <style:style style:parent-style-name="921" style:display-name="Subtle Reference" style:family="text" style:name="870">
      <style:paragraph-properties/>
      <style:text-properties fo:font-variant="small-caps" fo:color="#5a5a5a"/>
    </style:style>
    <style:style style:parent-style-name="921" style:display-name="Book Title" style:family="text" style:name="871">
      <style:paragraph-properties/>
      <style:text-properties fo:letter-spacing="0.25pt" fo:font-style="italic" fo:font-weight="bold"/>
    </style:style>
    <style:style style:parent-style-name="921" style:display-name="Header Char" style:family="text" style:name="872">
      <style:paragraph-properties/>
    </style:style>
    <style:style style:parent-style-name="921" style:display-name="Footer Char" style:family="text" style:name="873">
      <style:paragraph-properties/>
    </style:style>
    <style:style style:parent-style-name="843" style:display-name="footnote text" style:family="paragraph" style:name="874">
      <style:paragraph-properties fo:line-height="100%" fo:margin-bottom="0pt"/>
      <style:text-properties fo:font-size="10pt" style:font-size-complex="10pt"/>
    </style:style>
    <style:style style:parent-style-name="921" style:display-name="Footnote Text Char" style:family="text" style:name="875">
      <style:paragraph-properties/>
      <style:text-properties fo:font-size="10pt" style:font-size-complex="10pt"/>
    </style:style>
    <style:style style:parent-style-name="921" style:display-name="footnote reference" style:family="text" style:name="876">
      <style:paragraph-properties/>
      <style:text-properties style:text-position="super 58%"/>
    </style:style>
    <style:style style:parent-style-name="843" style:display-name="endnote text" style:family="paragraph" style:name="877">
      <style:paragraph-properties fo:line-height="100%" fo:margin-bottom="0pt"/>
      <style:text-properties fo:font-size="10pt" style:font-size-complex="10pt"/>
    </style:style>
    <style:style style:parent-style-name="921" style:display-name="Endnote Text Char" style:family="text" style:name="878">
      <style:paragraph-properties/>
      <style:text-properties fo:font-size="10pt" style:font-size-complex="10pt"/>
    </style:style>
    <style:style style:parent-style-name="921" style:display-name="endnote reference" style:family="text" style:name="879">
      <style:paragraph-properties/>
      <style:text-properties style:text-position="super 58%"/>
    </style:style>
    <style:style style:parent-style-name="921" style:display-name="Hyperlink" style:family="text" style:name="880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843" style:display-name="Internet link" style:family="text" style:name="881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921" style:display-name="FollowedHyperlink" style:family="text" style:name="882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843" style:display-name="toc 1" style:family="paragraph" style:name="883">
      <style:paragraph-properties fo:margin-bottom="5pt"/>
    </style:style>
    <style:style style:parent-style-name="843" style:display-name="toc 2" style:family="paragraph" style:name="884">
      <style:paragraph-properties fo:margin-left="0.3881cm" fo:margin-right="0cm" fo:text-indent="0cm" fo:margin-bottom="5pt"/>
    </style:style>
    <style:style style:parent-style-name="843" style:display-name="toc 3" style:family="paragraph" style:name="885">
      <style:paragraph-properties fo:margin-left="0.7762cm" fo:margin-right="0cm" fo:text-indent="0cm" fo:margin-bottom="5pt"/>
    </style:style>
    <style:style style:parent-style-name="843" style:display-name="toc 4" style:family="paragraph" style:name="886">
      <style:paragraph-properties fo:margin-left="1.164cm" fo:margin-right="0cm" fo:text-indent="0cm" fo:margin-bottom="5pt"/>
    </style:style>
    <style:style style:parent-style-name="843" style:display-name="toc 5" style:family="paragraph" style:name="887">
      <style:paragraph-properties fo:margin-left="1.552cm" fo:margin-right="0cm" fo:text-indent="0cm" fo:margin-bottom="5pt"/>
    </style:style>
    <style:style style:parent-style-name="843" style:display-name="toc 6" style:family="paragraph" style:name="888">
      <style:paragraph-properties fo:margin-left="1.94cm" fo:margin-right="0cm" fo:text-indent="0cm" fo:margin-bottom="5pt"/>
    </style:style>
    <style:style style:parent-style-name="843" style:display-name="toc 7" style:family="paragraph" style:name="889">
      <style:paragraph-properties fo:margin-left="2.328cm" fo:margin-right="0cm" fo:text-indent="0cm" fo:margin-bottom="5pt"/>
    </style:style>
    <style:style style:parent-style-name="843" style:display-name="toc 8" style:family="paragraph" style:name="890">
      <style:paragraph-properties fo:margin-left="2.717cm" fo:margin-right="0cm" fo:text-indent="0cm" fo:margin-bottom="5pt"/>
    </style:style>
    <style:style style:parent-style-name="843" style:display-name="toc 9" style:family="paragraph" style:name="891">
      <style:paragraph-properties fo:margin-left="3.105cm" fo:margin-right="0cm" fo:text-indent="0cm" fo:margin-bottom="5pt"/>
    </style:style>
    <style:style style:parent-style-name="921" style:display-name="Placeholder Text" style:family="text" style:name="892">
      <style:paragraph-properties/>
      <style:text-properties fo:color="#666666"/>
    </style:style>
    <style:style style:parent-style-name="843" style:display-name="TOC Heading" style:family="paragraph" style:name="893">
      <style:paragraph-properties/>
    </style:style>
    <style:style style:parent-style-name="843" style:display-name="table of figures" style:family="paragraph" style:name="894">
      <style:paragraph-properties fo:margin-bottom="0pt"/>
    </style:style>
    <style:style style:parent-style-name="843" style:display-name="DStyle_paragraph" style:family="paragraph" style:name="895">
      <style:paragraph-properties/>
      <style:text-properties fo:color="#000000" fo:font-family="Calibri" style:font-family-complex="Calibri" fo:font-size="11pt" style:font-size-complex="11pt" fo:language="en" style:language-complex="ar" fo:country="US" style:country-complex="SA"/>
    </style:style>
    <style:style style:parent-style-name="895" style:display-name="Standard" style:family="paragraph" style:name="896">
      <style:paragraph-properties fo:text-align="left" fo:margin-top="0pt" fo:margin-bottom="0pt"/>
      <style:text-properties fo:font-family="Gill Sans MT" style:font-family-complex="Gill Sans MT" fo:language="pt" fo:country="PT"/>
    </style:style>
    <style:style style:parent-style-name="896" style:display-name="Heading" style:family="paragraph" style:name="897">
      <style:paragraph-properties fo:margin-top="12pt" fo:margin-bottom="6pt"/>
      <style:text-properties fo:font-family="Liberation Sans" style:font-family-complex="Liberation Sans" fo:font-size="14pt" style:font-size-complex="14pt"/>
    </style:style>
    <style:style style:parent-style-name="896" style:display-name="Text body" style:family="paragraph" style:name="898">
      <style:paragraph-properties/>
      <style:text-properties fo:font-size="9pt" style:font-size-complex="9pt"/>
    </style:style>
    <style:style style:parent-style-name="898" style:display-name="List" style:family="paragraph" style:name="899">
      <style:paragraph-properties/>
    </style:style>
    <style:style style:parent-style-name="896" style:display-name="Caption" style:family="paragraph" style:name="900">
      <style:paragraph-properties fo:margin-top="6pt" fo:margin-bottom="6pt"/>
      <style:text-properties fo:font-size="12pt" style:font-size-complex="12pt" fo:font-style="italic"/>
    </style:style>
    <style:style style:parent-style-name="896" style:display-name="Index" style:family="paragraph" style:name="901">
      <style:paragraph-properties/>
    </style:style>
    <style:style style:parent-style-name="896" style:display-name="Heading 1" style:family="paragraph" style:name="902">
      <style:paragraph-properties fo:margin-left="0.8414cm" fo:margin-right="0cm" fo:text-indent="0cm"/>
      <style:text-properties fo:font-family="Trebuchet MS" style:font-family-complex="Trebuchet MS" fo:font-size="15pt" style:font-size-complex="15pt" style:text-underline-type="single" style:text-underline-style="solid" style:text-underline-width="auto" style:text-underline-color="font-color"/>
    </style:style>
    <style:style style:parent-style-name="896" style:display-name="Heading 2" style:family="paragraph" style:name="903">
      <style:paragraph-properties fo:margin-left="1.265cm" fo:margin-right="0cm" fo:text-indent="0cm"/>
      <style:text-properties fo:font-family="Lucida Sans" style:font-family-complex="Lucida Sans" fo:font-size="14.5pt" style:font-size-complex="14.5pt" style:text-underline-type="single" style:text-underline-style="solid" style:text-underline-width="auto" style:text-underline-color="font-color"/>
    </style:style>
    <style:style style:parent-style-name="896" style:display-name="Heading 3" style:family="paragraph" style:name="904">
      <style:paragraph-properties fo:margin-left="1.088cm" fo:margin-right="0cm" fo:text-indent="0cm"/>
      <style:text-properties fo:font-family="Lucida Sans" style:font-family-complex="Lucida Sans" fo:font-size="13pt" style:font-size-complex="13pt" style:text-underline-type="single" style:text-underline-style="solid" style:text-underline-width="auto" style:text-underline-color="font-color"/>
    </style:style>
    <style:style style:parent-style-name="896" style:display-name="Heading 4" style:family="paragraph" style:name="905">
      <style:paragraph-properties/>
      <style:text-properties fo:font-family="Lucida Sans" style:font-family-complex="Lucida Sans" fo:font-size="12.5pt" style:font-size-complex="12.5pt" style:text-underline-type="single" style:text-underline-style="solid" style:text-underline-width="auto" style:text-underline-color="font-color"/>
    </style:style>
    <style:style style:parent-style-name="896" style:display-name="Heading 5" style:family="paragraph" style:name="906">
      <style:paragraph-properties/>
      <style:text-properties fo:font-size="10pt" style:font-size-complex="10pt"/>
    </style:style>
    <style:style style:parent-style-name="896" style:display-name="List Paragraph" style:family="paragraph" style:name="907">
      <style:paragraph-properties/>
    </style:style>
    <style:style style:parent-style-name="896" style:display-name="Table Paragraph" style:family="paragraph" style:name="908">
      <style:paragraph-properties/>
    </style:style>
    <style:style style:parent-style-name="896" style:display-name="Header and Footer" style:family="paragraph" style:name="909">
      <style:paragraph-properties/>
    </style:style>
    <style:style style:parent-style-name="896" style:display-name="Header" style:family="paragraph" style:name="910">
      <style:paragraph-properties>
        <style:tab-stops>
          <style:tab-stop style:position="7.499cm" style:type="center"/>
          <style:tab-stop style:position="15cm" style:type="right"/>
        </style:tab-stops>
      </style:paragraph-properties>
    </style:style>
    <style:style style:parent-style-name="896" style:display-name="Footer" style:family="paragraph" style:name="911">
      <style:paragraph-properties>
        <style:tab-stops>
          <style:tab-stop style:position="7.499cm" style:type="center"/>
          <style:tab-stop style:position="15cm" style:type="right"/>
        </style:tab-stops>
      </style:paragraph-properties>
    </style:style>
    <style:style style:parent-style-name="897" style:display-name="Index Heading" style:family="paragraph" style:name="912">
      <style:paragraph-properties/>
    </style:style>
    <style:style style:parent-style-name="902" style:display-name="Contents Heading" style:family="paragraph" style:name="913">
      <style:paragraph-properties fo:line-height="107.917%" fo:margin-left="0cm" fo:margin-right="0cm" fo:text-indent="0cm" fo:margin-top="12pt" fo:margin-bottom="0pt"/>
      <style:text-properties fo:color="#365f91" fo:font-family="Cambria" style:font-family-complex="Cambria" fo:font-size="16pt" style:font-size-complex="16pt" fo:language="pt" fo:country="BR" style:text-underline-type="none" style:text-underline-width="auto"/>
    </style:style>
    <style:style style:parent-style-name="896" style:display-name="Normal (Web)" style:family="paragraph" style:name="914">
      <style:paragraph-properties fo:margin-top="14pt" fo:margin-bottom="14pt"/>
      <style:text-properties fo:font-family="Times New Roman" style:font-family-complex="Times New Roman" fo:font-size="12pt" style:font-size-complex="12pt" fo:language="pt" fo:country="BR"/>
    </style:style>
    <style:style style:parent-style-name="896" style:display-name="Footnote" style:family="paragraph" style:name="915">
      <style:paragraph-properties/>
      <style:text-properties fo:font-family="Times New Roman" style:font-family-complex="Times New Roman" fo:font-size="10pt" style:font-size-complex="10pt" fo:language="pt" fo:country="BR"/>
    </style:style>
    <style:style style:parent-style-name="896" style:display-name="Quote" style:family="paragraph" style:name="916">
      <style:paragraph-properties fo:text-align="center" fo:margin-left="1.524cm" fo:margin-right="1.524cm" fo:text-indent="0cm" fo:margin-top="10pt" fo:margin-bottom="8pt"/>
      <style:text-properties fo:color="#404040" fo:font-family="Times New Roman" style:font-family-complex="Times New Roman" fo:font-size="12pt" style:font-size-complex="12pt" fo:language="pt" fo:country="BR" fo:font-style="italic"/>
    </style:style>
    <style:style style:parent-style-name="896" style:display-name="paragrafopadrao" style:family="paragraph" style:name="917">
      <style:paragraph-properties fo:margin-top="14pt" fo:margin-bottom="14pt"/>
      <style:text-properties fo:font-family="Times New Roman" style:font-family-complex="Times New Roman" fo:font-size="12pt" style:font-size-complex="12pt" fo:language="pt" fo:country="BR"/>
    </style:style>
    <style:style style:parent-style-name="896" style:display-name="docdata" style:family="paragraph" style:name="918">
      <style:paragraph-properties fo:margin-top="14pt" fo:margin-bottom="14pt"/>
      <style:text-properties fo:font-family="Times New Roman" style:font-family-complex="Times New Roman" fo:font-size="12pt" style:font-size-complex="12pt" fo:language="pt" fo:country="BR"/>
    </style:style>
    <style:style style:parent-style-name="896" style:display-name="Plain Text" style:family="paragraph" style:name="919">
      <style:paragraph-properties/>
      <style:text-properties fo:font-family="Courier New" style:font-family-complex="Courier New" fo:font-size="10pt" style:font-size-complex="10pt" fo:language="pt" fo:country="BR"/>
    </style:style>
    <style:style style:parent-style-name="896" style:display-name="Frame contents" style:family="paragraph" style:name="920">
      <style:paragraph-properties/>
    </style:style>
    <style:style style:class="default" style:display-name="Default Paragraph Font" style:family="text" style:name="921">
      <style:paragraph-properties/>
    </style:style>
    <style:style style:parent-style-name="921" style:display-name="Cabeçalho Char" style:family="text" style:name="922">
      <style:paragraph-properties/>
      <style:text-properties fo:font-family="Gill Sans MT" style:font-family-complex="Gill Sans MT" fo:language="pt" fo:country="PT"/>
    </style:style>
    <style:style style:parent-style-name="921" style:display-name="Rodapé Char" style:family="text" style:name="923">
      <style:paragraph-properties/>
      <style:text-properties fo:font-family="Gill Sans MT" style:font-family-complex="Gill Sans MT" fo:language="pt" fo:country="PT"/>
    </style:style>
    <style:style style:parent-style-name="921" style:display-name="Internet link" style:family="text" style:name="924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921" style:display-name="Unresolved Mention" style:family="text" style:name="925">
      <style:paragraph-properties/>
      <style:text-properties fo:color="#605e5c" fo:background-color="#e1dfdd"/>
    </style:style>
    <style:style style:parent-style-name="921" style:display-name="Texto de nota de rodapé Char" style:family="text" style:name="926">
      <style:paragraph-properties/>
      <style:text-properties fo:font-family="Times New Roman" style:font-family-complex="Times New Roman" fo:font-size="10pt" style:font-size-complex="10pt" fo:language="pt" fo:country="BR"/>
    </style:style>
    <style:style style:parent-style-name="843" style:display-name="Footnote Symbol" style:family="text" style:name="927">
      <style:paragraph-properties/>
      <style:text-properties style:text-position="super 58%"/>
    </style:style>
    <style:style style:parent-style-name="843" style:display-name="Footnote anchor" style:family="text" style:name="928">
      <style:paragraph-properties/>
      <style:text-properties style:text-position="super 58%"/>
    </style:style>
    <style:style style:parent-style-name="843" style:display-name="Strong Emphasis" style:family="text" style:name="929">
      <style:paragraph-properties/>
      <style:text-properties fo:font-weight="bold"/>
    </style:style>
    <style:style style:parent-style-name="921" style:display-name="Citação Char" style:family="text" style:name="930">
      <style:paragraph-properties/>
      <style:text-properties fo:color="#404040" fo:font-family="Times New Roman" style:font-family-complex="Times New Roman" fo:font-size="12pt" style:font-size-complex="12pt" fo:language="pt" fo:country="BR" fo:font-style="italic"/>
    </style:style>
    <style:style style:parent-style-name="843" style:display-name="Corpo de texto Char" style:family="text" style:name="931">
      <style:paragraph-properties/>
      <style:text-properties fo:font-family="Gill Sans MT" style:font-family-complex="Gill Sans MT" fo:font-size="9pt" style:font-size-complex="9pt" fo:language="pt" fo:country="PT"/>
    </style:style>
    <style:style style:parent-style-name="921" style:display-name="Texto sem Formatação Char" style:family="text" style:name="932">
      <style:paragraph-properties/>
      <style:text-properties fo:font-family="Courier New" style:font-family-complex="Courier New" fo:font-size="10pt" style:font-size-complex="10pt" fo:language="pt" fo:country="BR"/>
    </style:style>
    <style:style style:parent-style-name="843" style:display-name="ListLabel 1" style:family="text" style:name="933">
      <style:paragraph-properties/>
      <style:text-properties fo:font-family="Calibri" style:font-family-complex="Calibri" fo:font-size="10pt"/>
    </style:style>
    <style:style style:parent-style-name="843" style:display-name="ListLabel 2" style:family="text" style:name="934">
      <style:paragraph-properties/>
      <style:text-properties fo:font-size="10pt"/>
    </style:style>
    <style:style style:parent-style-name="843" style:display-name="ListLabel 3" style:family="text" style:name="935">
      <style:paragraph-properties/>
      <style:text-properties fo:font-size="10pt"/>
    </style:style>
    <style:style style:parent-style-name="843" style:display-name="ListLabel 4" style:family="text" style:name="936">
      <style:paragraph-properties/>
      <style:text-properties fo:font-size="10pt"/>
    </style:style>
    <style:style style:parent-style-name="843" style:display-name="ListLabel 5" style:family="text" style:name="937">
      <style:paragraph-properties/>
      <style:text-properties fo:font-size="10pt"/>
    </style:style>
    <style:style style:parent-style-name="843" style:display-name="ListLabel 6" style:family="text" style:name="938">
      <style:paragraph-properties/>
      <style:text-properties fo:font-size="10pt"/>
    </style:style>
    <style:style style:parent-style-name="843" style:display-name="ListLabel 7" style:family="text" style:name="939">
      <style:paragraph-properties/>
      <style:text-properties fo:font-size="10pt"/>
    </style:style>
    <style:style style:parent-style-name="843" style:display-name="ListLabel 8" style:family="text" style:name="940">
      <style:paragraph-properties/>
      <style:text-properties fo:font-size="10pt"/>
    </style:style>
    <style:style style:parent-style-name="843" style:display-name="ListLabel 9" style:family="text" style:name="941">
      <style:paragraph-properties/>
      <style:text-properties fo:font-size="10pt"/>
    </style:style>
    <style:style style:parent-style-name="843" style:display-name="ListLabel 10" style:family="text" style:name="942">
      <style:paragraph-properties/>
    </style:style>
    <style:style style:parent-style-name="843" style:display-name="ListLabel 11" style:family="text" style:name="943">
      <style:paragraph-properties/>
    </style:style>
    <style:style style:parent-style-name="843" style:display-name="ListLabel 12" style:family="text" style:name="944">
      <style:paragraph-properties/>
    </style:style>
    <style:style style:parent-style-name="843" style:display-name="ListLabel 13" style:family="text" style:name="945">
      <style:paragraph-properties/>
    </style:style>
    <style:style style:parent-style-name="843" style:display-name="ListLabel 14" style:family="text" style:name="946">
      <style:paragraph-properties/>
    </style:style>
    <style:style style:parent-style-name="843" style:display-name="ListLabel 15" style:family="text" style:name="947">
      <style:paragraph-properties/>
    </style:style>
    <style:style style:parent-style-name="843" style:display-name="ListLabel 16" style:family="text" style:name="948">
      <style:paragraph-properties/>
    </style:style>
    <style:style style:parent-style-name="843" style:display-name="ListLabel 17" style:family="text" style:name="949">
      <style:paragraph-properties/>
    </style:style>
    <style:style style:parent-style-name="843" style:display-name="ListLabel 18" style:family="text" style:name="950">
      <style:paragraph-properties/>
    </style:style>
    <style:style style:parent-style-name="843" style:display-name="ListLabel 19" style:family="text" style:name="951">
      <style:paragraph-properties/>
    </style:style>
    <style:style style:parent-style-name="843" style:display-name="ListLabel 20" style:family="text" style:name="952">
      <style:paragraph-properties/>
    </style:style>
    <style:style style:parent-style-name="843" style:display-name="ListLabel 21" style:family="text" style:name="953">
      <style:paragraph-properties/>
    </style:style>
    <style:style style:parent-style-name="843" style:display-name="ListLabel 22" style:family="text" style:name="954">
      <style:paragraph-properties/>
    </style:style>
    <style:style style:parent-style-name="843" style:display-name="ListLabel 23" style:family="text" style:name="955">
      <style:paragraph-properties/>
    </style:style>
    <style:style style:parent-style-name="843" style:display-name="ListLabel 24" style:family="text" style:name="956">
      <style:paragraph-properties/>
    </style:style>
    <style:style style:parent-style-name="843" style:display-name="ListLabel 25" style:family="text" style:name="957">
      <style:paragraph-properties/>
    </style:style>
    <style:style style:parent-style-name="843" style:display-name="ListLabel 26" style:family="text" style:name="958">
      <style:paragraph-properties/>
    </style:style>
    <style:style style:parent-style-name="843" style:display-name="ListLabel 27" style:family="text" style:name="959">
      <style:paragraph-properties/>
    </style:style>
    <style:style style:parent-style-name="843" style:display-name="ListLabel 28" style:family="text" style:name="960">
      <style:paragraph-properties/>
    </style:style>
    <style:style style:parent-style-name="843" style:display-name="ListLabel 29" style:family="text" style:name="961">
      <style:paragraph-properties/>
    </style:style>
    <style:style style:parent-style-name="843" style:display-name="ListLabel 30" style:family="text" style:name="962">
      <style:paragraph-properties/>
    </style:style>
    <style:style style:parent-style-name="843" style:display-name="ListLabel 31" style:family="text" style:name="963">
      <style:paragraph-properties/>
    </style:style>
    <style:style style:parent-style-name="843" style:display-name="ListLabel 32" style:family="text" style:name="964">
      <style:paragraph-properties/>
    </style:style>
    <style:style style:parent-style-name="843" style:display-name="ListLabel 33" style:family="text" style:name="965">
      <style:paragraph-properties/>
    </style:style>
    <style:style style:parent-style-name="843" style:display-name="ListLabel 34" style:family="text" style:name="966">
      <style:paragraph-properties/>
    </style:style>
    <style:style style:parent-style-name="843" style:display-name="ListLabel 35" style:family="text" style:name="967">
      <style:paragraph-properties/>
    </style:style>
    <style:style style:parent-style-name="843" style:display-name="ListLabel 36" style:family="text" style:name="968">
      <style:paragraph-properties/>
    </style:style>
    <style:style style:parent-style-name="843" style:display-name="ListLabel 37" style:family="text" style:name="969">
      <style:paragraph-properties/>
    </style:style>
    <style:style style:parent-style-name="843" style:display-name="ListLabel 38" style:family="text" style:name="970">
      <style:paragraph-properties/>
    </style:style>
    <style:style style:parent-style-name="843" style:display-name="ListLabel 39" style:family="text" style:name="971">
      <style:paragraph-properties/>
    </style:style>
    <style:style style:parent-style-name="843" style:display-name="ListLabel 40" style:family="text" style:name="972">
      <style:paragraph-properties/>
    </style:style>
    <style:style style:parent-style-name="843" style:display-name="ListLabel 41" style:family="text" style:name="973">
      <style:paragraph-properties/>
    </style:style>
    <style:style style:parent-style-name="843" style:display-name="ListLabel 42" style:family="text" style:name="974">
      <style:paragraph-properties/>
    </style:style>
    <style:style style:parent-style-name="843" style:display-name="ListLabel 43" style:family="text" style:name="975">
      <style:paragraph-properties/>
    </style:style>
    <style:style style:parent-style-name="843" style:display-name="ListLabel 44" style:family="text" style:name="976">
      <style:paragraph-properties/>
    </style:style>
    <style:style style:parent-style-name="843" style:display-name="ListLabel 45" style:family="text" style:name="977">
      <style:paragraph-properties/>
    </style:style>
    <style:style style:parent-style-name="843" style:display-name="ListLabel 46" style:family="text" style:name="978">
      <style:paragraph-properties/>
    </style:style>
    <style:style style:parent-style-name="843" style:display-name="ListLabel 47" style:family="text" style:name="979">
      <style:paragraph-properties/>
    </style:style>
    <style:style style:parent-style-name="843" style:display-name="ListLabel 48" style:family="text" style:name="980">
      <style:paragraph-properties/>
    </style:style>
    <style:style style:parent-style-name="843" style:display-name="ListLabel 49" style:family="text" style:name="981">
      <style:paragraph-properties/>
    </style:style>
    <style:style style:parent-style-name="843" style:display-name="ListLabel 50" style:family="text" style:name="982">
      <style:paragraph-properties/>
    </style:style>
    <style:style style:parent-style-name="843" style:display-name="ListLabel 51" style:family="text" style:name="983">
      <style:paragraph-properties/>
    </style:style>
    <style:style style:parent-style-name="843" style:display-name="ListLabel 52" style:family="text" style:name="984">
      <style:paragraph-properties/>
    </style:style>
    <style:style style:parent-style-name="843" style:display-name="ListLabel 53" style:family="text" style:name="985">
      <style:paragraph-properties/>
    </style:style>
    <style:style style:parent-style-name="843" style:display-name="ListLabel 54" style:family="text" style:name="986">
      <style:paragraph-properties/>
    </style:style>
    <style:style style:parent-style-name="843" style:display-name="ListLabel 55" style:family="text" style:name="987">
      <style:paragraph-properties/>
    </style:style>
    <style:style style:parent-style-name="843" style:display-name="ListLabel 56" style:family="text" style:name="988">
      <style:paragraph-properties/>
    </style:style>
    <style:style style:parent-style-name="843" style:display-name="ListLabel 57" style:family="text" style:name="989">
      <style:paragraph-properties/>
    </style:style>
    <style:style style:parent-style-name="843" style:display-name="ListLabel 58" style:family="text" style:name="990">
      <style:paragraph-properties/>
    </style:style>
    <style:style style:parent-style-name="843" style:display-name="ListLabel 59" style:family="text" style:name="991">
      <style:paragraph-properties/>
    </style:style>
    <style:style style:parent-style-name="843" style:display-name="ListLabel 60" style:family="text" style:name="992">
      <style:paragraph-properties/>
    </style:style>
    <style:style style:parent-style-name="843" style:display-name="ListLabel 61" style:family="text" style:name="993">
      <style:paragraph-properties/>
    </style:style>
    <style:style style:parent-style-name="843" style:display-name="ListLabel 62" style:family="text" style:name="994">
      <style:paragraph-properties/>
    </style:style>
    <style:style style:parent-style-name="843" style:display-name="ListLabel 63" style:family="text" style:name="995">
      <style:paragraph-properties/>
    </style:style>
    <style:style style:parent-style-name="843" style:display-name="ListLabel 64" style:family="text" style:name="996">
      <style:paragraph-properties/>
    </style:style>
    <style:style style:parent-style-name="843" style:display-name="ListLabel 65" style:family="text" style:name="997">
      <style:paragraph-properties/>
    </style:style>
    <style:style style:parent-style-name="843" style:display-name="ListLabel 66" style:family="text" style:name="998">
      <style:paragraph-properties/>
    </style:style>
    <style:style style:parent-style-name="843" style:display-name="ListLabel 67" style:family="text" style:name="999">
      <style:paragraph-properties/>
    </style:style>
    <style:style style:parent-style-name="843" style:display-name="ListLabel 68" style:family="text" style:name="1000">
      <style:paragraph-properties/>
    </style:style>
    <style:style style:parent-style-name="843" style:display-name="ListLabel 69" style:family="text" style:name="1001">
      <style:paragraph-properties/>
    </style:style>
    <style:style style:parent-style-name="843" style:display-name="ListLabel 70" style:family="text" style:name="1002">
      <style:paragraph-properties/>
    </style:style>
    <style:style style:parent-style-name="843" style:display-name="ListLabel 71" style:family="text" style:name="1003">
      <style:paragraph-properties/>
    </style:style>
    <style:style style:parent-style-name="843" style:display-name="ListLabel 72" style:family="text" style:name="1004">
      <style:paragraph-properties/>
    </style:style>
    <style:style style:parent-style-name="843" style:display-name="ListLabel 73" style:family="text" style:name="1005">
      <style:paragraph-properties/>
    </style:style>
    <style:style style:parent-style-name="843" style:display-name="ListLabel 74" style:family="text" style:name="1006">
      <style:paragraph-properties/>
    </style:style>
    <style:style style:parent-style-name="843" style:display-name="ListLabel 75" style:family="text" style:name="1007">
      <style:paragraph-properties/>
    </style:style>
    <style:style style:parent-style-name="843" style:display-name="ListLabel 76" style:family="text" style:name="1008">
      <style:paragraph-properties/>
    </style:style>
    <style:style style:parent-style-name="843" style:display-name="ListLabel 77" style:family="text" style:name="1009">
      <style:paragraph-properties/>
    </style:style>
    <style:style style:parent-style-name="843" style:display-name="ListLabel 78" style:family="text" style:name="1010">
      <style:paragraph-properties/>
    </style:style>
    <style:style style:parent-style-name="843" style:display-name="ListLabel 79" style:family="text" style:name="1011">
      <style:paragraph-properties/>
    </style:style>
    <style:style style:parent-style-name="843" style:display-name="ListLabel 80" style:family="text" style:name="1012">
      <style:paragraph-properties/>
    </style:style>
    <style:style style:parent-style-name="843" style:display-name="ListLabel 81" style:family="text" style:name="1013">
      <style:paragraph-properties/>
    </style:style>
    <style:style style:parent-style-name="843" style:display-name="ListLabel 82" style:family="text" style:name="1014">
      <style:paragraph-properties/>
    </style:style>
    <style:style style:parent-style-name="843" style:display-name="ListLabel 83" style:family="text" style:name="1015">
      <style:paragraph-properties/>
    </style:style>
    <style:style style:parent-style-name="843" style:display-name="ListLabel 84" style:family="text" style:name="1016">
      <style:paragraph-properties/>
    </style:style>
    <style:style style:parent-style-name="843" style:display-name="ListLabel 85" style:family="text" style:name="1017">
      <style:paragraph-properties/>
    </style:style>
    <style:style style:parent-style-name="843" style:display-name="ListLabel 86" style:family="text" style:name="1018">
      <style:paragraph-properties/>
    </style:style>
    <style:style style:parent-style-name="843" style:display-name="ListLabel 87" style:family="text" style:name="1019">
      <style:paragraph-properties/>
    </style:style>
    <style:style style:parent-style-name="843" style:display-name="ListLabel 88" style:family="text" style:name="1020">
      <style:paragraph-properties/>
    </style:style>
    <style:style style:parent-style-name="843" style:display-name="ListLabel 89" style:family="text" style:name="1021">
      <style:paragraph-properties/>
    </style:style>
    <style:style style:parent-style-name="843" style:display-name="ListLabel 90" style:family="text" style:name="1022">
      <style:paragraph-properties/>
    </style:style>
    <style:style style:parent-style-name="843" style:display-name="ListLabel 91" style:family="text" style:name="1023">
      <style:paragraph-properties/>
    </style:style>
    <style:style style:parent-style-name="843" style:display-name="ListLabel 92" style:family="text" style:name="1024">
      <style:paragraph-properties/>
    </style:style>
    <style:style style:parent-style-name="843" style:display-name="ListLabel 93" style:family="text" style:name="1025">
      <style:paragraph-properties/>
    </style:style>
    <style:style style:parent-style-name="843" style:display-name="ListLabel 94" style:family="text" style:name="1026">
      <style:paragraph-properties/>
    </style:style>
    <style:style style:parent-style-name="843" style:display-name="ListLabel 95" style:family="text" style:name="1027">
      <style:paragraph-properties/>
    </style:style>
    <style:style style:parent-style-name="843" style:display-name="ListLabel 96" style:family="text" style:name="1028">
      <style:paragraph-properties/>
    </style:style>
    <style:style style:parent-style-name="843" style:display-name="ListLabel 97" style:family="text" style:name="1029">
      <style:paragraph-properties/>
    </style:style>
    <style:style style:parent-style-name="843" style:display-name="ListLabel 98" style:family="text" style:name="1030">
      <style:paragraph-properties/>
    </style:style>
    <style:style style:parent-style-name="843" style:display-name="ListLabel 99" style:family="text" style:name="1031">
      <style:paragraph-properties/>
    </style:style>
    <style:style style:parent-style-name="843" style:display-name="ListLabel 100" style:family="text" style:name="1032">
      <style:paragraph-properties/>
    </style:style>
    <style:style style:parent-style-name="843" style:display-name="ListLabel 101" style:family="text" style:name="1033">
      <style:paragraph-properties/>
    </style:style>
    <style:style style:parent-style-name="843" style:display-name="ListLabel 102" style:family="text" style:name="1034">
      <style:paragraph-properties/>
    </style:style>
    <style:style style:parent-style-name="843" style:display-name="ListLabel 103" style:family="text" style:name="1035">
      <style:paragraph-properties/>
    </style:style>
    <style:style style:parent-style-name="843" style:display-name="ListLabel 104" style:family="text" style:name="1036">
      <style:paragraph-properties/>
    </style:style>
    <style:style style:parent-style-name="843" style:display-name="ListLabel 105" style:family="text" style:name="1037">
      <style:paragraph-properties/>
    </style:style>
    <style:style style:parent-style-name="843" style:display-name="ListLabel 106" style:family="text" style:name="1038">
      <style:paragraph-properties/>
    </style:style>
    <style:style style:parent-style-name="843" style:display-name="ListLabel 107" style:family="text" style:name="1039">
      <style:paragraph-properties/>
    </style:style>
    <style:style style:parent-style-name="843" style:display-name="ListLabel 108" style:family="text" style:name="1040">
      <style:paragraph-properties/>
    </style:style>
    <style:style style:parent-style-name="843" style:display-name="ListLabel 109" style:family="text" style:name="1041">
      <style:paragraph-properties/>
    </style:style>
    <style:style style:parent-style-name="843" style:display-name="ListLabel 110" style:family="text" style:name="1042">
      <style:paragraph-properties/>
    </style:style>
    <style:style style:parent-style-name="843" style:display-name="ListLabel 111" style:family="text" style:name="1043">
      <style:paragraph-properties/>
    </style:style>
    <style:style style:parent-style-name="843" style:display-name="ListLabel 112" style:family="text" style:name="1044">
      <style:paragraph-properties/>
    </style:style>
    <style:style style:parent-style-name="843" style:display-name="ListLabel 113" style:family="text" style:name="1045">
      <style:paragraph-properties/>
    </style:style>
    <style:style style:parent-style-name="843" style:display-name="ListLabel 114" style:family="text" style:name="1046">
      <style:paragraph-properties/>
    </style:style>
    <style:style style:parent-style-name="843" style:display-name="ListLabel 115" style:family="text" style:name="1047">
      <style:paragraph-properties/>
    </style:style>
    <style:style style:parent-style-name="843" style:display-name="ListLabel 116" style:family="text" style:name="1048">
      <style:paragraph-properties/>
    </style:style>
    <style:style style:parent-style-name="843" style:display-name="ListLabel 117" style:family="text" style:name="1049">
      <style:paragraph-properties/>
    </style:style>
    <style:style style:parent-style-name="843" style:display-name="ListLabel 118" style:family="text" style:name="1050">
      <style:paragraph-properties/>
    </style:style>
    <style:style style:parent-style-name="843" style:display-name="ListLabel 119" style:family="text" style:name="1051">
      <style:paragraph-properties/>
    </style:style>
    <style:style style:parent-style-name="843" style:display-name="ListLabel 120" style:family="text" style:name="1052">
      <style:paragraph-properties/>
    </style:style>
    <style:style style:parent-style-name="843" style:display-name="ListLabel 121" style:family="text" style:name="1053">
      <style:paragraph-properties/>
    </style:style>
    <style:style style:parent-style-name="843" style:display-name="ListLabel 122" style:family="text" style:name="1054">
      <style:paragraph-properties/>
    </style:style>
    <style:style style:parent-style-name="843" style:display-name="ListLabel 123" style:family="text" style:name="1055">
      <style:paragraph-properties/>
    </style:style>
    <style:style style:parent-style-name="843" style:display-name="ListLabel 124" style:family="text" style:name="1056">
      <style:paragraph-properties/>
    </style:style>
    <style:style style:parent-style-name="843" style:display-name="ListLabel 125" style:family="text" style:name="1057">
      <style:paragraph-properties/>
    </style:style>
    <style:style style:parent-style-name="843" style:display-name="ListLabel 126" style:family="text" style:name="1058">
      <style:paragraph-properties/>
    </style:style>
    <style:style style:parent-style-name="843" style:display-name="ListLabel 127" style:family="text" style:name="1059">
      <style:paragraph-properties/>
      <style:text-properties fo:font-family="Tahoma" style:font-family-complex="Tahoma" fo:font-size="10pt" style:font-size-complex="10pt"/>
    </style:style>
    <style:style style:parent-style-name="843" style:display-name="ListLabel 128" style:family="text" style:name="1060">
      <style:paragraph-properties/>
      <style:text-properties fo:font-family="Tahoma" style:font-family-complex="Tahoma" fo:font-size="10pt" style:font-size-complex="10pt" fo:font-weight="bold"/>
    </style:style>
    <style:style style:parent-style-name="843" style:display-name="T1" style:family="text" style:name="1061">
      <style:paragraph-properties/>
    </style:style>
    <style:style style:parent-style-name="843" style:display-name="T2" style:family="text" style:name="1062">
      <style:paragraph-properties/>
    </style:style>
    <style:style style:parent-style-name="843" style:display-name="T3" style:family="text" style:name="1063">
      <style:paragraph-properties/>
    </style:style>
    <style:style style:parent-style-name="843" style:display-name="T4" style:family="text" style:name="1064">
      <style:paragraph-properties/>
    </style:style>
    <style:style style:parent-style-name="843" style:display-name="T5" style:family="text" style:name="1065">
      <style:paragraph-properties/>
    </style:style>
    <style:style style:parent-style-name="843" style:display-name="T6" style:family="text" style:name="1066">
      <style:paragraph-properties/>
    </style:style>
    <style:style style:parent-style-name="843" style:display-name="T7" style:family="text" style:name="1067">
      <style:paragraph-properties/>
    </style:style>
    <style:style style:parent-style-name="843" style:display-name="T8" style:family="text" style:name="1068">
      <style:paragraph-properties/>
    </style:style>
    <style:style style:parent-style-name="843" style:display-name="T9" style:family="text" style:name="1069">
      <style:paragraph-properties/>
    </style:style>
    <style:style style:parent-style-name="843" style:display-name="T10" style:family="text" style:name="1070">
      <style:paragraph-properties/>
      <style:text-properties fo:font-family="Symbol" style:font-family-complex="Symbol"/>
    </style:style>
    <style:style style:parent-style-name="843" style:display-name="T11" style:family="text" style:name="1071">
      <style:paragraph-properties/>
      <style:text-properties fo:font-family="'Courier New'" style:font-family-complex="'Courier New'"/>
    </style:style>
    <style:style style:parent-style-name="843" style:display-name="T12" style:family="text" style:name="1072">
      <style:paragraph-properties/>
      <style:text-properties fo:font-family="Wingdings" style:font-family-complex="Wingdings"/>
    </style:style>
    <style:style style:parent-style-name="843" style:display-name="T13" style:family="text" style:name="1073">
      <style:paragraph-properties/>
      <style:text-properties fo:font-family="Wingdings" style:font-family-complex="Wingdings"/>
    </style:style>
    <style:style style:parent-style-name="843" style:display-name="T14" style:family="text" style:name="1074">
      <style:paragraph-properties/>
      <style:text-properties fo:font-family="Wingdings" style:font-family-complex="Wingdings"/>
    </style:style>
    <style:style style:parent-style-name="843" style:display-name="T15" style:family="text" style:name="1075">
      <style:paragraph-properties/>
      <style:text-properties fo:font-family="Wingdings" style:font-family-complex="Wingdings"/>
    </style:style>
    <style:style style:parent-style-name="843" style:display-name="T16" style:family="text" style:name="1076">
      <style:paragraph-properties/>
      <style:text-properties fo:font-family="Wingdings" style:font-family-complex="Wingdings"/>
    </style:style>
    <style:style style:parent-style-name="843" style:display-name="T17" style:family="text" style:name="1077">
      <style:paragraph-properties/>
      <style:text-properties fo:font-family="Wingdings" style:font-family-complex="Wingdings"/>
    </style:style>
    <style:style style:parent-style-name="843" style:display-name="T18" style:family="text" style:name="1078">
      <style:paragraph-properties/>
      <style:text-properties fo:font-family="Wingdings" style:font-family-complex="Wingdings"/>
    </style:style>
    <style:style style:parent-style-name="843" style:display-name="T19" style:family="text" style:name="1079">
      <style:paragraph-properties/>
    </style:style>
    <style:style style:parent-style-name="843" style:display-name="T20" style:family="text" style:name="1080">
      <style:paragraph-properties/>
    </style:style>
    <style:style style:parent-style-name="843" style:display-name="T21" style:family="text" style:name="1081">
      <style:paragraph-properties/>
    </style:style>
    <style:style style:parent-style-name="843" style:display-name="T22" style:family="text" style:name="1082">
      <style:paragraph-properties/>
    </style:style>
    <style:style style:parent-style-name="843" style:display-name="T23" style:family="text" style:name="1083">
      <style:paragraph-properties/>
    </style:style>
    <style:style style:parent-style-name="843" style:display-name="T24" style:family="text" style:name="1084">
      <style:paragraph-properties/>
    </style:style>
    <style:style style:parent-style-name="843" style:display-name="T25" style:family="text" style:name="1085">
      <style:paragraph-properties/>
    </style:style>
    <style:style style:parent-style-name="843" style:display-name="T26" style:family="text" style:name="1086">
      <style:paragraph-properties/>
    </style:style>
    <style:style style:parent-style-name="843" style:display-name="T27" style:family="text" style:name="1087">
      <style:paragraph-properties/>
    </style:style>
    <style:style style:parent-style-name="843" style:display-name="T28" style:family="text" style:name="1088">
      <style:paragraph-properties/>
    </style:style>
    <style:style style:parent-style-name="843" style:display-name="T29" style:family="text" style:name="1089">
      <style:paragraph-properties/>
    </style:style>
    <style:style style:parent-style-name="843" style:display-name="T30" style:family="text" style:name="1090">
      <style:paragraph-properties/>
    </style:style>
    <style:style style:parent-style-name="843" style:display-name="T31" style:family="text" style:name="1091">
      <style:paragraph-properties/>
    </style:style>
    <style:style style:parent-style-name="843" style:display-name="T32" style:family="text" style:name="1092">
      <style:paragraph-properties/>
    </style:style>
    <style:style style:parent-style-name="843" style:display-name="T33" style:family="text" style:name="1093">
      <style:paragraph-properties/>
    </style:style>
    <style:style style:parent-style-name="843" style:display-name="T34" style:family="text" style:name="1094">
      <style:paragraph-properties/>
    </style:style>
    <style:style style:parent-style-name="843" style:display-name="T35" style:family="text" style:name="1095">
      <style:paragraph-properties/>
    </style:style>
    <style:style style:parent-style-name="843" style:display-name="T36" style:family="text" style:name="1096">
      <style:paragraph-properties/>
    </style:style>
    <style:style style:parent-style-name="843" style:display-name="T37" style:family="text" style:name="1097">
      <style:paragraph-properties/>
    </style:style>
    <style:style style:parent-style-name="843" style:display-name="T38" style:family="text" style:name="1098">
      <style:paragraph-properties/>
    </style:style>
    <style:style style:parent-style-name="843" style:display-name="T39" style:family="text" style:name="1099">
      <style:paragraph-properties/>
    </style:style>
    <style:style style:parent-style-name="843" style:display-name="T40" style:family="text" style:name="1100">
      <style:paragraph-properties/>
    </style:style>
    <style:style style:parent-style-name="843" style:display-name="T41" style:family="text" style:name="1101">
      <style:paragraph-properties/>
    </style:style>
    <style:style style:parent-style-name="843" style:display-name="T42" style:family="text" style:name="1102">
      <style:paragraph-properties/>
    </style:style>
    <style:style style:parent-style-name="843" style:display-name="T43" style:family="text" style:name="1103">
      <style:paragraph-properties/>
    </style:style>
    <style:style style:parent-style-name="843" style:display-name="T44" style:family="text" style:name="1104">
      <style:paragraph-properties/>
    </style:style>
    <style:style style:parent-style-name="843" style:display-name="T45" style:family="text" style:name="1105">
      <style:paragraph-properties/>
    </style:style>
    <style:style style:parent-style-name="843" style:display-name="T46" style:family="text" style:name="1106">
      <style:paragraph-properties/>
    </style:style>
    <style:style style:parent-style-name="843" style:display-name="T47" style:family="text" style:name="1107">
      <style:paragraph-properties/>
    </style:style>
    <style:style style:parent-style-name="843" style:display-name="T48" style:family="text" style:name="1108">
      <style:paragraph-properties/>
    </style:style>
    <style:style style:parent-style-name="843" style:display-name="T49" style:family="text" style:name="1109">
      <style:paragraph-properties/>
    </style:style>
    <style:style style:parent-style-name="843" style:display-name="T50" style:family="text" style:name="1110">
      <style:paragraph-properties/>
    </style:style>
    <style:style style:parent-style-name="843" style:display-name="T51" style:family="text" style:name="1111">
      <style:paragraph-properties/>
    </style:style>
    <style:style style:parent-style-name="843" style:display-name="T52" style:family="text" style:name="1112">
      <style:paragraph-properties/>
    </style:style>
    <style:style style:parent-style-name="843" style:display-name="T53" style:family="text" style:name="1113">
      <style:paragraph-properties/>
    </style:style>
    <style:style style:parent-style-name="843" style:display-name="T54" style:family="text" style:name="1114">
      <style:paragraph-properties/>
    </style:style>
    <style:style style:parent-style-name="843" style:display-name="T55" style:family="text" style:name="1115">
      <style:paragraph-properties/>
    </style:style>
    <style:style style:parent-style-name="843" style:display-name="T56" style:family="text" style:name="1116">
      <style:paragraph-properties/>
    </style:style>
    <style:style style:parent-style-name="843" style:display-name="T57" style:family="text" style:name="1117">
      <style:paragraph-properties/>
    </style:style>
    <style:style style:parent-style-name="843" style:display-name="T58" style:family="text" style:name="1118">
      <style:paragraph-properties/>
    </style:style>
    <style:style style:parent-style-name="843" style:display-name="T59" style:family="text" style:name="1119">
      <style:paragraph-properties/>
    </style:style>
    <style:style style:parent-style-name="843" style:display-name="T60" style:family="text" style:name="1120">
      <style:paragraph-properties/>
    </style:style>
    <style:style style:parent-style-name="843" style:display-name="T61" style:family="text" style:name="1121">
      <style:paragraph-properties/>
    </style:style>
    <style:style style:parent-style-name="843" style:display-name="T62" style:family="text" style:name="1122">
      <style:paragraph-properties/>
    </style:style>
    <style:style style:parent-style-name="843" style:display-name="T63" style:family="text" style:name="1123">
      <style:paragraph-properties/>
    </style:style>
    <style:style style:parent-style-name="843" style:display-name="T64" style:family="text" style:name="1124">
      <style:paragraph-properties/>
    </style:style>
    <style:style style:parent-style-name="843" style:display-name="T65" style:family="text" style:name="1125">
      <style:paragraph-properties/>
    </style:style>
    <style:style style:parent-style-name="843" style:display-name="T66" style:family="text" style:name="1126">
      <style:paragraph-properties/>
    </style:style>
    <style:style style:parent-style-name="843" style:display-name="T67" style:family="text" style:name="1127">
      <style:paragraph-properties/>
    </style:style>
    <style:style style:parent-style-name="843" style:display-name="T68" style:family="text" style:name="1128">
      <style:paragraph-properties/>
    </style:style>
    <style:style style:parent-style-name="843" style:display-name="T69" style:family="text" style:name="1129">
      <style:paragraph-properties/>
    </style:style>
    <style:style style:parent-style-name="843" style:display-name="T70" style:family="text" style:name="1130">
      <style:paragraph-properties/>
    </style:style>
    <style:style style:parent-style-name="843" style:display-name="T71" style:family="text" style:name="1131">
      <style:paragraph-properties/>
    </style:style>
    <style:style style:parent-style-name="843" style:display-name="T72" style:family="text" style:name="1132">
      <style:paragraph-properties/>
    </style:style>
    <style:style style:parent-style-name="843" style:display-name="T73" style:family="text" style:name="1133">
      <style:paragraph-properties/>
    </style:style>
    <style:style style:parent-style-name="843" style:display-name="T74" style:family="text" style:name="1134">
      <style:paragraph-properties/>
    </style:style>
    <style:style style:parent-style-name="843" style:display-name="T75" style:family="text" style:name="1135">
      <style:paragraph-properties/>
    </style:style>
    <style:style style:parent-style-name="843" style:display-name="T76" style:family="text" style:name="1136">
      <style:paragraph-properties/>
    </style:style>
    <style:style style:parent-style-name="843" style:display-name="T77" style:family="text" style:name="1137">
      <style:paragraph-properties/>
    </style:style>
    <style:style style:parent-style-name="843" style:display-name="T78" style:family="text" style:name="1138">
      <style:paragraph-properties/>
    </style:style>
    <style:style style:parent-style-name="843" style:display-name="T79" style:family="text" style:name="1139">
      <style:paragraph-properties/>
    </style:style>
    <style:style style:parent-style-name="843" style:display-name="T80" style:family="text" style:name="1140">
      <style:paragraph-properties/>
    </style:style>
    <style:style style:parent-style-name="843" style:display-name="T81" style:family="text" style:name="1141">
      <style:paragraph-properties/>
    </style:style>
    <style:style style:parent-style-name="843" style:display-name="T82" style:family="text" style:name="1142">
      <style:paragraph-properties/>
    </style:style>
    <style:style style:parent-style-name="843" style:display-name="T83" style:family="text" style:name="1143">
      <style:paragraph-properties/>
    </style:style>
    <style:style style:parent-style-name="843" style:display-name="T84" style:family="text" style:name="1144">
      <style:paragraph-properties/>
    </style:style>
    <style:style style:parent-style-name="843" style:display-name="T85" style:family="text" style:name="1145">
      <style:paragraph-properties/>
    </style:style>
    <style:style style:parent-style-name="843" style:display-name="T86" style:family="text" style:name="1146">
      <style:paragraph-properties/>
    </style:style>
    <style:style style:parent-style-name="843" style:display-name="T87" style:family="text" style:name="1147">
      <style:paragraph-properties/>
    </style:style>
    <style:style style:parent-style-name="843" style:display-name="T88" style:family="text" style:name="1148">
      <style:paragraph-properties/>
    </style:style>
    <style:style style:parent-style-name="843" style:display-name="T89" style:family="text" style:name="1149">
      <style:paragraph-properties/>
    </style:style>
    <style:style style:parent-style-name="843" style:display-name="T90" style:family="text" style:name="1150">
      <style:paragraph-properties/>
    </style:style>
    <style:style style:parent-style-name="843" style:display-name="T91" style:family="text" style:name="1151">
      <style:paragraph-properties/>
    </style:style>
    <style:style style:parent-style-name="843" style:display-name="T92" style:family="text" style:name="1152">
      <style:paragraph-properties/>
    </style:style>
    <style:style style:parent-style-name="843" style:display-name="T93" style:family="text" style:name="1153">
      <style:paragraph-properties/>
    </style:style>
    <style:style style:parent-style-name="843" style:display-name="T94" style:family="text" style:name="1154">
      <style:paragraph-properties/>
    </style:style>
    <style:style style:parent-style-name="843" style:display-name="T95" style:family="text" style:name="1155">
      <style:paragraph-properties/>
    </style:style>
    <style:style style:parent-style-name="843" style:display-name="T96" style:family="text" style:name="1156">
      <style:paragraph-properties/>
    </style:style>
    <style:style style:parent-style-name="843" style:display-name="T97" style:family="text" style:name="1157">
      <style:paragraph-properties/>
    </style:style>
    <style:style style:parent-style-name="843" style:display-name="T98" style:family="text" style:name="1158">
      <style:paragraph-properties/>
    </style:style>
    <style:style style:parent-style-name="843" style:display-name="T99" style:family="text" style:name="1159">
      <style:paragraph-properties/>
    </style:style>
    <style:style style:parent-style-name="843" style:display-name="T100" style:family="text" style:name="1160">
      <style:paragraph-properties/>
    </style:style>
    <style:style style:parent-style-name="843" style:display-name="T101" style:family="text" style:name="1161">
      <style:paragraph-properties/>
    </style:style>
    <style:style style:parent-style-name="843" style:display-name="T102" style:family="text" style:name="1162">
      <style:paragraph-properties/>
    </style:style>
    <style:style style:parent-style-name="843" style:display-name="T103" style:family="text" style:name="1163">
      <style:paragraph-properties/>
    </style:style>
    <style:style style:parent-style-name="843" style:display-name="T104" style:family="text" style:name="1164">
      <style:paragraph-properties/>
    </style:style>
    <style:style style:parent-style-name="843" style:display-name="T105" style:family="text" style:name="1165">
      <style:paragraph-properties/>
    </style:style>
    <style:style style:parent-style-name="843" style:display-name="T106" style:family="text" style:name="1166">
      <style:paragraph-properties/>
    </style:style>
    <style:style style:parent-style-name="843" style:display-name="T107" style:family="text" style:name="1167">
      <style:paragraph-properties/>
    </style:style>
    <style:style style:parent-style-name="843" style:display-name="T108" style:family="text" style:name="1168">
      <style:paragraph-properties/>
    </style:style>
    <style:style style:parent-style-name="843" style:display-name="T109" style:family="text" style:name="1169">
      <style:paragraph-properties/>
    </style:style>
    <style:style style:parent-style-name="843" style:display-name="T110" style:family="text" style:name="1170">
      <style:paragraph-properties/>
    </style:style>
    <style:style style:parent-style-name="843" style:display-name="T111" style:family="text" style:name="1171">
      <style:paragraph-properties/>
    </style:style>
    <style:style style:parent-style-name="843" style:display-name="T112" style:family="text" style:name="1172">
      <style:paragraph-properties/>
    </style:style>
    <style:style style:parent-style-name="843" style:display-name="T113" style:family="text" style:name="1173">
      <style:paragraph-properties/>
    </style:style>
    <style:style style:parent-style-name="843" style:display-name="T114" style:family="text" style:name="1174">
      <style:paragraph-properties/>
    </style:style>
    <style:style style:parent-style-name="843" style:display-name="T115" style:family="text" style:name="1175">
      <style:paragraph-properties/>
    </style:style>
    <style:style style:parent-style-name="843" style:display-name="T116" style:family="text" style:name="1176">
      <style:paragraph-properties/>
    </style:style>
    <style:style style:parent-style-name="843" style:display-name="T117" style:family="text" style:name="1177">
      <style:paragraph-properties/>
    </style:style>
    <style:style style:parent-style-name="843" style:display-name="T118" style:family="text" style:name="1178">
      <style:paragraph-properties/>
    </style:style>
    <style:style style:parent-style-name="843" style:display-name="T119" style:family="text" style:name="1179">
      <style:paragraph-properties/>
    </style:style>
    <style:style style:parent-style-name="843" style:display-name="T120" style:family="text" style:name="1180">
      <style:paragraph-properties/>
    </style:style>
    <style:style style:parent-style-name="843" style:display-name="T121" style:family="text" style:name="1181">
      <style:paragraph-properties/>
    </style:style>
    <style:style style:parent-style-name="843" style:display-name="T122" style:family="text" style:name="1182">
      <style:paragraph-properties/>
    </style:style>
    <style:style style:parent-style-name="843" style:display-name="T123" style:family="text" style:name="1183">
      <style:paragraph-properties/>
    </style:style>
    <style:style style:parent-style-name="843" style:display-name="T124" style:family="text" style:name="1184">
      <style:paragraph-properties/>
    </style:style>
    <style:style style:parent-style-name="843" style:display-name="T125" style:family="text" style:name="1185">
      <style:paragraph-properties/>
    </style:style>
    <style:style style:parent-style-name="843" style:display-name="T126" style:family="text" style:name="1186">
      <style:paragraph-properties/>
    </style:style>
    <style:style style:parent-style-name="843" style:display-name="T127" style:family="text" style:name="1187">
      <style:paragraph-properties/>
    </style:style>
    <style:style style:parent-style-name="843" style:display-name="T128" style:family="text" style:name="1188">
      <style:paragraph-properties/>
    </style:style>
    <style:style style:parent-style-name="843" style:display-name="T129" style:family="text" style:name="1189">
      <style:paragraph-properties/>
    </style:style>
    <style:style style:parent-style-name="843" style:display-name="T130" style:family="text" style:name="1190">
      <style:paragraph-properties/>
    </style:style>
    <style:style style:parent-style-name="843" style:display-name="T131" style:family="text" style:name="1191">
      <style:paragraph-properties/>
    </style:style>
    <style:style style:parent-style-name="843" style:display-name="T132" style:family="text" style:name="1192">
      <style:paragraph-properties/>
    </style:style>
    <style:style style:parent-style-name="843" style:display-name="T133" style:family="text" style:name="1193">
      <style:paragraph-properties/>
    </style:style>
    <style:style style:parent-style-name="843" style:display-name="T134" style:family="text" style:name="1194">
      <style:paragraph-properties/>
    </style:style>
    <style:style style:parent-style-name="843" style:display-name="T135" style:family="text" style:name="1195">
      <style:paragraph-properties/>
    </style:style>
    <style:style style:parent-style-name="843" style:display-name="T136" style:family="text" style:name="1196">
      <style:paragraph-properties/>
    </style:style>
    <style:style style:parent-style-name="843" style:display-name="T137" style:family="text" style:name="1197">
      <style:paragraph-properties/>
    </style:style>
    <style:style style:parent-style-name="843" style:display-name="T138" style:family="text" style:name="1198">
      <style:paragraph-properties/>
    </style:style>
    <style:style style:parent-style-name="843" style:display-name="T139" style:family="text" style:name="1199">
      <style:paragraph-properties/>
    </style:style>
    <style:style style:parent-style-name="843" style:display-name="T140" style:family="text" style:name="1200">
      <style:paragraph-properties/>
    </style:style>
    <style:style style:parent-style-name="843" style:display-name="T141" style:family="text" style:name="1201">
      <style:paragraph-properties/>
    </style:style>
    <style:style style:parent-style-name="843" style:display-name="T142" style:family="text" style:name="1202">
      <style:paragraph-properties/>
    </style:style>
    <style:style style:parent-style-name="843" style:display-name="T143" style:family="text" style:name="1203">
      <style:paragraph-properties/>
    </style:style>
    <style:style style:parent-style-name="843" style:display-name="T144" style:family="text" style:name="1204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'Courier New'" style:font-family-complex="'Courier New'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Wingdings" style:font-family-complex="Wingdings"/>
    </style:style>
    <style:style style:family="text" style:name="T14">
      <style:text-properties fo:font-family="Wingdings" style:font-family-complex="Wingdings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Wingdings" style:font-family-complex="Wingdings"/>
    </style:style>
    <style:style style:family="text" style:name="T17">
      <style:text-properties fo:font-family="Wingdings" style:font-family-complex="Wingdings"/>
    </style:style>
    <style:style style:family="text" style:name="T18">
      <style:text-properties fo:font-family="Wingdings" style:font-family-complex="Wingdings"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">
      <text:list-level-style-bullet text:level="1" text:style-name="T10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12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3" text:bullet-char="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Wingdings" style:font-family-complex="Wingdings"/>
      </text:list-level-style-bullet>
      <text:list-level-style-bullet text:level="5" text:style-name="T14" text:bullet-char="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Wingdings" style:font-family-complex="Wingdings"/>
      </text:list-level-style-bullet>
      <text:list-level-style-bullet text:level="6" text:style-name="T15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6" text:bullet-char="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Wingdings" style:font-family-complex="Wingdings"/>
      </text:list-level-style-bullet>
      <text:list-level-style-bullet text:level="8" text:style-name="T17" text:bullet-char="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Wingdings" style:font-family-complex="Wingdings"/>
      </text:list-level-style-bullet>
      <text:list-level-style-bullet text:level="9" text:style-name="T18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">
      <text:list-level-style-number text:level="1" text:style-name="T19" style:num-format="a" style:num-letter-sync="true" style:num-suffix=")">
        <style:list-level-properties text:list-level-position-and-space-mode="label-alignment">
          <style:list-level-label-alignment fo:text-indent="-0.635cm" fo:margin-left="3.636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4.906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6.176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7.446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8.714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9.984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11.25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2.52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3.79cm"/>
        </style:list-level-properties>
        <style:text-properties/>
      </text:list-level-style-number>
    </text:list-style>
    <text:list-style style:name="WWNum4">
      <text:list-level-style-number text:level="1" text:style-name="T28" style:num-format="a" style:num-letter-sync="true" style:num-suffix=")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6.985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8.256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9.526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10.8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12.07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3.34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4.6cm"/>
        </style:list-level-properties>
        <style:text-properties/>
      </text:list-level-style-number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text-indent="-0.635cm" fo:margin-left="4.271cm"/>
        </style:list-level-properties>
        <style:text-properties/>
      </text:list-level-style-number>
      <text:list-level-style-number text:level="2" text:style-name="T38" style:num-format="a" style:num-letter-sync="true" style:num-suffix=".">
        <style:list-level-properties text:list-level-position-and-space-mode="label-alignment">
          <style:list-level-label-alignment fo:text-indent="-0.635cm" fo:margin-left="5.541cm"/>
        </style:list-level-properties>
        <style:text-properties/>
      </text:list-level-style-number>
      <text:list-level-style-number text:level="3" text:style-name="T39" style:num-format="i" style:num-suffix=".">
        <style:list-level-properties text:list-level-position-and-space-mode="label-alignment">
          <style:list-level-label-alignment fo:text-indent="-0.3175cm" fo:margin-left="6.811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fo:text-indent="-0.635cm" fo:margin-left="8.079cm"/>
        </style:list-level-properties>
        <style:text-properties/>
      </text:list-level-style-number>
      <text:list-level-style-number text:level="5" text:style-name="T41" style:num-format="a" style:num-letter-sync="true" style:num-suffix=".">
        <style:list-level-properties text:list-level-position-and-space-mode="label-alignment">
          <style:list-level-label-alignment fo:text-indent="-0.635cm" fo:margin-left="9.349cm"/>
        </style:list-level-properties>
        <style:text-properties/>
      </text:list-level-style-number>
      <text:list-level-style-number text:level="6" text:style-name="T42" style:num-format="i" style:num-suffix=".">
        <style:list-level-properties text:list-level-position-and-space-mode="label-alignment">
          <style:list-level-label-alignment fo:text-indent="-0.3175cm" fo:margin-left="10.62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fo:text-indent="-0.635cm" fo:margin-left="11.89cm"/>
        </style:list-level-properties>
        <style:text-properties/>
      </text:list-level-style-number>
      <text:list-level-style-number text:level="8" text:style-name="T44" style:num-format="a" style:num-letter-sync="true" style:num-suffix=".">
        <style:list-level-properties text:list-level-position-and-space-mode="label-alignment">
          <style:list-level-label-alignment fo:text-indent="-0.635cm" fo:margin-left="13.16cm"/>
        </style:list-level-properties>
        <style:text-properties/>
      </text:list-level-style-number>
      <text:list-level-style-number text:level="9" text:style-name="T45" style:num-format="i" style:num-suffix=".">
        <style:list-level-properties text:list-level-position-and-space-mode="label-alignment">
          <style:list-level-label-alignment fo:text-indent="-0.3175cm" fo:margin-left="14.43cm"/>
        </style:list-level-properties>
        <style:text-properties/>
      </text:list-level-style-number>
    </text:list-style>
    <text:list-style style:name="WWNum6">
      <text:list-level-style-number text:level="1" text:style-name="T46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47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3" text:style-name="T48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49" style:num-format="1" style:num-prefix="(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50" style:num-format="a" style:num-letter-sync="true" style:num-prefix="(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51" style:num-format="i" style:num-prefix="(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52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53" style:num-format="a" style:num-letter-sync="true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54" style:num-format="i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56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3" text:style-name="T57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4" text:style-name="T58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5" text:style-name="T5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  <text:list-level-style-number text:level="6" text:style-name="T60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  <style:text-properties/>
      </text:list-level-style-number>
      <text:list-level-style-number text:level="7" text:style-name="T61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  <style:text-properties/>
      </text:list-level-style-number>
      <text:list-level-style-number text:level="8" text:style-name="T62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  <style:text-properties/>
      </text:list-level-style-number>
      <text:list-level-style-number text:level="9" text:style-name="T63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  <style:text-properties/>
      </text:list-level-style-number>
    </text:list-style>
    <text:list-style style:name="WWNum8">
      <text:list-level-style-number text:level="1" text:style-name="T64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65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3" text:style-name="T66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4" text:style-name="T6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5" text:style-name="T68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  <text:list-level-style-number text:level="6" text:style-name="T69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  <style:text-properties/>
      </text:list-level-style-number>
      <text:list-level-style-number text:level="7" text:style-name="T70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  <style:text-properties/>
      </text:list-level-style-number>
      <text:list-level-style-number text:level="8" text:style-name="T71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  <style:text-properties/>
      </text:list-level-style-number>
      <text:list-level-style-number text:level="9" text:style-name="T72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  <style:text-properties/>
      </text:list-level-style-number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74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3" text:style-name="T7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4" text:style-name="T76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5" text:style-name="T77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  <text:list-level-style-number text:level="6" text:style-name="T78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  <style:text-properties/>
      </text:list-level-style-number>
      <text:list-level-style-number text:level="7" text:style-name="T79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  <style:text-properties/>
      </text:list-level-style-number>
      <text:list-level-style-number text:level="8" text:style-name="T80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  <style:text-properties/>
      </text:list-level-style-number>
      <text:list-level-style-number text:level="9" text:style-name="T81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  <style:text-properties/>
      </text:list-level-style-number>
    </text:list-style>
    <text:list-style style:name="WWNum10">
      <text:list-level-style-number text:level="1" text:style-name="T82" style:num-format="i" style:num-prefix="(" style:num-suffix=")">
        <style:list-level-properties text:list-level-position-and-space-mode="label-alignment">
          <style:list-level-label-alignment fo:text-indent="-1.27cm" fo:margin-left="4.271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text-indent="-0.635cm" fo:margin-left="4.906cm"/>
        </style:list-level-properties>
        <style:text-properties/>
      </text:list-level-style-number>
      <text:list-level-style-number text:level="3" text:style-name="T84" style:num-format="i" style:num-suffix=".">
        <style:list-level-properties text:list-level-position-and-space-mode="label-alignment">
          <style:list-level-label-alignment fo:text-indent="-0.3175cm" fo:margin-left="6.176cm"/>
        </style:list-level-properties>
        <style:text-properties/>
      </text:list-level-style-number>
      <text:list-level-style-number text:level="4" text:style-name="T85" style:num-format="1" style:num-suffix=".">
        <style:list-level-properties text:list-level-position-and-space-mode="label-alignment">
          <style:list-level-label-alignment fo:text-indent="-0.635cm" fo:margin-left="7.446cm"/>
        </style:list-level-properties>
        <style:text-properties/>
      </text:list-level-style-number>
      <text:list-level-style-number text:level="5" text:style-name="T86" style:num-format="a" style:num-letter-sync="true" style:num-suffix=".">
        <style:list-level-properties text:list-level-position-and-space-mode="label-alignment">
          <style:list-level-label-alignment fo:text-indent="-0.635cm" fo:margin-left="8.714cm"/>
        </style:list-level-properties>
        <style:text-properties/>
      </text:list-level-style-number>
      <text:list-level-style-number text:level="6" text:style-name="T87" style:num-format="i" style:num-suffix=".">
        <style:list-level-properties text:list-level-position-and-space-mode="label-alignment">
          <style:list-level-label-alignment fo:text-indent="-0.3175cm" fo:margin-left="9.984cm"/>
        </style:list-level-properties>
        <style:text-properties/>
      </text:list-level-style-number>
      <text:list-level-style-number text:level="7" text:style-name="T88" style:num-format="1" style:num-suffix=".">
        <style:list-level-properties text:list-level-position-and-space-mode="label-alignment">
          <style:list-level-label-alignment fo:text-indent="-0.635cm" fo:margin-left="11.25cm"/>
        </style:list-level-properties>
        <style:text-properties/>
      </text:list-level-style-number>
      <text:list-level-style-number text:level="8" text:style-name="T89" style:num-format="a" style:num-letter-sync="true" style:num-suffix=".">
        <style:list-level-properties text:list-level-position-and-space-mode="label-alignment">
          <style:list-level-label-alignment fo:text-indent="-0.635cm" fo:margin-left="12.52cm"/>
        </style:list-level-properties>
        <style:text-properties/>
      </text:list-level-style-number>
      <text:list-level-style-number text:level="9" text:style-name="T90" style:num-format="i" style:num-suffix=".">
        <style:list-level-properties text:list-level-position-and-space-mode="label-alignment">
          <style:list-level-label-alignment fo:text-indent="-0.3175cm" fo:margin-left="13.79cm"/>
        </style:list-level-properties>
        <style:text-properties/>
      </text:list-level-style-number>
    </text:list-style>
    <text:list-style style:name="WWNum11">
      <text:list-level-style-number text:level="1" text:style-name="T91" style:num-format="i" style:num-prefix="(" style:num-suffix=")">
        <style:list-level-properties text:list-level-position-and-space-mode="label-alignment">
          <style:list-level-label-alignment fo:text-indent="-1.27cm" fo:margin-left="4.271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text-indent="-0.635cm" fo:margin-left="4.906cm"/>
        </style:list-level-properties>
        <style:text-properties/>
      </text:list-level-style-number>
      <text:list-level-style-number text:level="3" text:style-name="T93" style:num-format="i" style:num-suffix=".">
        <style:list-level-properties text:list-level-position-and-space-mode="label-alignment">
          <style:list-level-label-alignment fo:text-indent="-0.3175cm" fo:margin-left="6.176cm"/>
        </style:list-level-properties>
        <style:text-properties/>
      </text:list-level-style-number>
      <text:list-level-style-number text:level="4" text:style-name="T94" style:num-format="1" style:num-suffix=".">
        <style:list-level-properties text:list-level-position-and-space-mode="label-alignment">
          <style:list-level-label-alignment fo:text-indent="-0.635cm" fo:margin-left="7.446cm"/>
        </style:list-level-properties>
        <style:text-properties/>
      </text:list-level-style-number>
      <text:list-level-style-number text:level="5" text:style-name="T95" style:num-format="a" style:num-letter-sync="true" style:num-suffix=".">
        <style:list-level-properties text:list-level-position-and-space-mode="label-alignment">
          <style:list-level-label-alignment fo:text-indent="-0.635cm" fo:margin-left="8.714cm"/>
        </style:list-level-properties>
        <style:text-properties/>
      </text:list-level-style-number>
      <text:list-level-style-number text:level="6" text:style-name="T96" style:num-format="i" style:num-suffix=".">
        <style:list-level-properties text:list-level-position-and-space-mode="label-alignment">
          <style:list-level-label-alignment fo:text-indent="-0.3175cm" fo:margin-left="9.984cm"/>
        </style:list-level-properties>
        <style:text-properties/>
      </text:list-level-style-number>
      <text:list-level-style-number text:level="7" text:style-name="T97" style:num-format="1" style:num-suffix=".">
        <style:list-level-properties text:list-level-position-and-space-mode="label-alignment">
          <style:list-level-label-alignment fo:text-indent="-0.635cm" fo:margin-left="11.25cm"/>
        </style:list-level-properties>
        <style:text-properties/>
      </text:list-level-style-number>
      <text:list-level-style-number text:level="8" text:style-name="T98" style:num-format="a" style:num-letter-sync="true" style:num-suffix=".">
        <style:list-level-properties text:list-level-position-and-space-mode="label-alignment">
          <style:list-level-label-alignment fo:text-indent="-0.635cm" fo:margin-left="12.52cm"/>
        </style:list-level-properties>
        <style:text-properties/>
      </text:list-level-style-number>
      <text:list-level-style-number text:level="9" text:style-name="T99" style:num-format="i" style:num-suffix=".">
        <style:list-level-properties text:list-level-position-and-space-mode="label-alignment">
          <style:list-level-label-alignment fo:text-indent="-0.3175cm" fo:margin-left="13.79cm"/>
        </style:list-level-properties>
        <style:text-properties/>
      </text:list-level-style-number>
    </text:list-style>
    <text:list-style style:name="WWNum12">
      <text:list-level-style-number text:level="1" text:style-name="T100" style:num-format="a" style:num-letter-sync="true" style:num-suffix=")">
        <style:list-level-properties text:list-level-position-and-space-mode="label-alignment">
          <style:list-level-label-alignment fo:text-indent="-1.27cm" fo:margin-left="4.271cm"/>
        </style:list-level-properties>
        <style:text-properties/>
      </text:list-level-style-number>
      <text:list-level-style-number text:level="2" text:style-name="T101" style:num-format="a" style:num-letter-sync="true" style:num-suffix=".">
        <style:list-level-properties text:list-level-position-and-space-mode="label-alignment">
          <style:list-level-label-alignment fo:text-indent="-0.635cm" fo:margin-left="4.906cm"/>
        </style:list-level-properties>
        <style:text-properties/>
      </text:list-level-style-number>
      <text:list-level-style-number text:level="3" text:style-name="T102" style:num-format="i" style:num-suffix=".">
        <style:list-level-properties text:list-level-position-and-space-mode="label-alignment">
          <style:list-level-label-alignment fo:text-indent="-0.3175cm" fo:margin-left="6.176cm"/>
        </style:list-level-properties>
        <style:text-properties/>
      </text:list-level-style-number>
      <text:list-level-style-number text:level="4" text:style-name="T103" style:num-format="1" style:num-suffix=".">
        <style:list-level-properties text:list-level-position-and-space-mode="label-alignment">
          <style:list-level-label-alignment fo:text-indent="-0.635cm" fo:margin-left="7.446cm"/>
        </style:list-level-properties>
        <style:text-properties/>
      </text:list-level-style-number>
      <text:list-level-style-number text:level="5" text:style-name="T104" style:num-format="a" style:num-letter-sync="true" style:num-suffix=".">
        <style:list-level-properties text:list-level-position-and-space-mode="label-alignment">
          <style:list-level-label-alignment fo:text-indent="-0.635cm" fo:margin-left="8.714cm"/>
        </style:list-level-properties>
        <style:text-properties/>
      </text:list-level-style-number>
      <text:list-level-style-number text:level="6" text:style-name="T105" style:num-format="i" style:num-suffix=".">
        <style:list-level-properties text:list-level-position-and-space-mode="label-alignment">
          <style:list-level-label-alignment fo:text-indent="-0.3175cm" fo:margin-left="9.984cm"/>
        </style:list-level-properties>
        <style:text-properties/>
      </text:list-level-style-number>
      <text:list-level-style-number text:level="7" text:style-name="T106" style:num-format="1" style:num-suffix=".">
        <style:list-level-properties text:list-level-position-and-space-mode="label-alignment">
          <style:list-level-label-alignment fo:text-indent="-0.635cm" fo:margin-left="11.25cm"/>
        </style:list-level-properties>
        <style:text-properties/>
      </text:list-level-style-number>
      <text:list-level-style-number text:level="8" text:style-name="T107" style:num-format="a" style:num-letter-sync="true" style:num-suffix=".">
        <style:list-level-properties text:list-level-position-and-space-mode="label-alignment">
          <style:list-level-label-alignment fo:text-indent="-0.635cm" fo:margin-left="12.52cm"/>
        </style:list-level-properties>
        <style:text-properties/>
      </text:list-level-style-number>
      <text:list-level-style-number text:level="9" text:style-name="T108" style:num-format="i" style:num-suffix=".">
        <style:list-level-properties text:list-level-position-and-space-mode="label-alignment">
          <style:list-level-label-alignment fo:text-indent="-0.3175cm" fo:margin-left="13.79cm"/>
        </style:list-level-properties>
        <style:text-properties/>
      </text:list-level-style-number>
    </text:list-style>
    <text:list-style style:name="WWNum13">
      <text:list-level-style-number text:level="1" text:style-name="T109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110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3" text:style-name="T111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4" text:style-name="T112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5" text:style-name="T113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  <text:list-level-style-number text:level="6" text:style-name="T114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  <style:text-properties/>
      </text:list-level-style-number>
      <text:list-level-style-number text:level="7" text:style-name="T115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  <style:text-properties/>
      </text:list-level-style-number>
      <text:list-level-style-number text:level="8" text:style-name="T116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  <style:text-properties/>
      </text:list-level-style-number>
      <text:list-level-style-number text:level="9" text:style-name="T117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  <style:text-properties/>
      </text:list-level-style-number>
    </text:list-style>
    <text:list-style style:name="WWNum14">
      <text:list-level-style-number text:level="1" text:style-name="T118" style:num-format="a" style:num-letter-sync="true" style:num-suffix=")">
        <style:list-level-properties text:list-level-position-and-space-mode="label-alignment">
          <style:list-level-label-alignment fo:text-indent="-0.635cm" fo:margin-left="3.636cm"/>
        </style:list-level-properties>
        <style:text-properties/>
      </text:list-level-style-number>
      <text:list-level-style-number text:level="2" text:style-name="T119" style:num-format="a" style:num-letter-sync="true" style:num-suffix=".">
        <style:list-level-properties text:list-level-position-and-space-mode="label-alignment">
          <style:list-level-label-alignment fo:text-indent="-0.635cm" fo:margin-left="4.906cm"/>
        </style:list-level-properties>
        <style:text-properties/>
      </text:list-level-style-number>
      <text:list-level-style-number text:level="3" text:style-name="T120" style:num-format="i" style:num-suffix=".">
        <style:list-level-properties text:list-level-position-and-space-mode="label-alignment">
          <style:list-level-label-alignment fo:text-indent="-0.3175cm" fo:margin-left="6.176cm"/>
        </style:list-level-properties>
        <style:text-properties/>
      </text:list-level-style-number>
      <text:list-level-style-number text:level="4" text:style-name="T121" style:num-format="1" style:num-suffix=".">
        <style:list-level-properties text:list-level-position-and-space-mode="label-alignment">
          <style:list-level-label-alignment fo:text-indent="-0.635cm" fo:margin-left="7.446cm"/>
        </style:list-level-properties>
        <style:text-properties/>
      </text:list-level-style-number>
      <text:list-level-style-number text:level="5" text:style-name="T122" style:num-format="a" style:num-letter-sync="true" style:num-suffix=".">
        <style:list-level-properties text:list-level-position-and-space-mode="label-alignment">
          <style:list-level-label-alignment fo:text-indent="-0.635cm" fo:margin-left="8.714cm"/>
        </style:list-level-properties>
        <style:text-properties/>
      </text:list-level-style-number>
      <text:list-level-style-number text:level="6" text:style-name="T123" style:num-format="i" style:num-suffix=".">
        <style:list-level-properties text:list-level-position-and-space-mode="label-alignment">
          <style:list-level-label-alignment fo:text-indent="-0.3175cm" fo:margin-left="9.984cm"/>
        </style:list-level-properties>
        <style:text-properties/>
      </text:list-level-style-number>
      <text:list-level-style-number text:level="7" text:style-name="T124" style:num-format="1" style:num-suffix=".">
        <style:list-level-properties text:list-level-position-and-space-mode="label-alignment">
          <style:list-level-label-alignment fo:text-indent="-0.635cm" fo:margin-left="11.25cm"/>
        </style:list-level-properties>
        <style:text-properties/>
      </text:list-level-style-number>
      <text:list-level-style-number text:level="8" text:style-name="T125" style:num-format="a" style:num-letter-sync="true" style:num-suffix=".">
        <style:list-level-properties text:list-level-position-and-space-mode="label-alignment">
          <style:list-level-label-alignment fo:text-indent="-0.635cm" fo:margin-left="12.52cm"/>
        </style:list-level-properties>
        <style:text-properties/>
      </text:list-level-style-number>
      <text:list-level-style-number text:level="9" text:style-name="T126" style:num-format="i" style:num-suffix=".">
        <style:list-level-properties text:list-level-position-and-space-mode="label-alignment">
          <style:list-level-label-alignment fo:text-indent="-0.3175cm" fo:margin-left="13.79cm"/>
        </style:list-level-properties>
        <style:text-properties/>
      </text:list-level-style-number>
    </text:list-style>
    <text:list-style style:name="WWNum15">
      <text:list-level-style-number text:level="1" text:style-name="T127" style:num-format="a" style:num-letter-sync="true" style:num-suffix=")">
        <style:list-level-properties text:list-level-position-and-space-mode="label-alignment">
          <style:list-level-label-alignment fo:text-indent="-0.635cm" fo:margin-left="3.636cm"/>
        </style:list-level-properties>
        <style:text-properties/>
      </text:list-level-style-number>
      <text:list-level-style-number text:level="2" text:style-name="T128" style:num-format="a" style:num-letter-sync="true" style:num-suffix=".">
        <style:list-level-properties text:list-level-position-and-space-mode="label-alignment">
          <style:list-level-label-alignment fo:text-indent="-0.635cm" fo:margin-left="4.906cm"/>
        </style:list-level-properties>
        <style:text-properties/>
      </text:list-level-style-number>
      <text:list-level-style-number text:level="3" text:style-name="T129" style:num-format="i" style:num-suffix=".">
        <style:list-level-properties text:list-level-position-and-space-mode="label-alignment">
          <style:list-level-label-alignment fo:text-indent="-0.3175cm" fo:margin-left="6.176cm"/>
        </style:list-level-properties>
        <style:text-properties/>
      </text:list-level-style-number>
      <text:list-level-style-number text:level="4" text:style-name="T130" style:num-format="1" style:num-suffix=".">
        <style:list-level-properties text:list-level-position-and-space-mode="label-alignment">
          <style:list-level-label-alignment fo:text-indent="-0.635cm" fo:margin-left="7.446cm"/>
        </style:list-level-properties>
        <style:text-properties/>
      </text:list-level-style-number>
      <text:list-level-style-number text:level="5" text:style-name="T131" style:num-format="a" style:num-letter-sync="true" style:num-suffix=".">
        <style:list-level-properties text:list-level-position-and-space-mode="label-alignment">
          <style:list-level-label-alignment fo:text-indent="-0.635cm" fo:margin-left="8.714cm"/>
        </style:list-level-properties>
        <style:text-properties/>
      </text:list-level-style-number>
      <text:list-level-style-number text:level="6" text:style-name="T132" style:num-format="i" style:num-suffix=".">
        <style:list-level-properties text:list-level-position-and-space-mode="label-alignment">
          <style:list-level-label-alignment fo:text-indent="-0.3175cm" fo:margin-left="9.984cm"/>
        </style:list-level-properties>
        <style:text-properties/>
      </text:list-level-style-number>
      <text:list-level-style-number text:level="7" text:style-name="T133" style:num-format="1" style:num-suffix=".">
        <style:list-level-properties text:list-level-position-and-space-mode="label-alignment">
          <style:list-level-label-alignment fo:text-indent="-0.635cm" fo:margin-left="11.25cm"/>
        </style:list-level-properties>
        <style:text-properties/>
      </text:list-level-style-number>
      <text:list-level-style-number text:level="8" text:style-name="T134" style:num-format="a" style:num-letter-sync="true" style:num-suffix=".">
        <style:list-level-properties text:list-level-position-and-space-mode="label-alignment">
          <style:list-level-label-alignment fo:text-indent="-0.635cm" fo:margin-left="12.52cm"/>
        </style:list-level-properties>
        <style:text-properties/>
      </text:list-level-style-number>
      <text:list-level-style-number text:level="9" text:style-name="T135" style:num-format="i" style:num-suffix=".">
        <style:list-level-properties text:list-level-position-and-space-mode="label-alignment">
          <style:list-level-label-alignment fo:text-indent="-0.3175cm" fo:margin-left="13.79cm"/>
        </style:list-level-properties>
        <style:text-properties/>
      </text:list-level-style-number>
    </text:list-style>
    <text:list-style style:name="WWNum16">
      <text:list-level-style-bullet text:level="1" text:style-name="T13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37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3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3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40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4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4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4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4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.27cm" fo:margin-bottom="0.1535cm" fo:margin-left="1.667cm" fo:margin-right="2.505cm"/>
      <style:header-style>
        <style:header-footer-properties svg:height="2.771cm" fo:min-height="2.27cm"/>
      </style:header-style>
      <style:footer-style>
        <style:header-footer-properties fo:min-height="0.1535cm"/>
      </style:footer-style>
    </style:page-layout>
    <style:page-layout style:name="Mpm2">
      <style:page-layout-properties fo:page-width="21cm" fo:page-height="29.7cm" style:print-orientation="portrait" fo:margin-top="2.27cm" fo:margin-bottom="0.1535cm" fo:margin-left="1.667cm" fo:margin-right="2.505cm"/>
    </style:page-layout>
    <style:style style:parent-style-name="896" style:family="paragraph" style:name="P50">
      <style:paragraph-properties fo:margin-left="0cm" fo:margin-right="0cm" fo:text-indent="0.9967cm"/>
      <style:text-properties fo:font-family="Tahoma" style:font-family-complex="Tahoma" fo:font-size="9pt" style:font-size-complex="9pt" fo:font-weight="bold"/>
    </style:style>
    <style:style style:family="text" style:name="T461">
      <style:text-properties fo:font-family="Tahoma" style:font-family-complex="Tahoma" fo:font-size="9pt" style:font-size-complex="9pt" fo:font-weight="bold"/>
    </style:style>
    <style:style style:family="text" style:name="T462">
      <style:text-properties fo:font-family="Tahoma" style:font-family-complex="Tahoma" fo:font-size="9pt" style:font-size-complex="9pt" fo:font-weight="bold"/>
    </style:style>
    <style:style style:parent-style-name="Graphics" style:family="graphic" style:name="gr3">
      <style:graphic-properties draw:image-opacity="100%" style:repeat="stretch" style:wrap="parallel" fo:margin-left="0.318cm" fo:margin-right="0.318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463">
      <style:text-properties fo:font-family="Tahoma" style:font-family-complex="Tahoma" fo:font-size="9pt" style:font-size-complex="9pt" fo:font-weight="bold"/>
    </style:style>
    <style:style style:family="graphic" style:name="gr4">
      <style:graphic-properties draw:fill-color="#953735" draw:fill="solid" draw:stroke="none" style:wrap="run-through" style:run-through="background" fo:margin-left="0cm" fo:margin-right="0.008998cm" fo:margin-top="0cm" fo:margin-bottom="0.026cm" style:horizontal-pos="from-left" style:horizontal-rel="page-content" style:vertical-pos="from-top" style:vertical-rel="paragraph"/>
    </style:style>
    <style:style style:family="text" style:name="T464">
      <style:text-properties fo:font-family="Tahoma" style:font-family-complex="Tahoma" fo:font-size="9pt" style:font-size-complex="9pt" fo:font-weight="bold"/>
    </style:style>
    <style:style style:family="graphic" style:name="gr5">
      <style:graphic-properties draw:fill-color="#953735" draw:fill="solid" draw:stroke="none" style:wrap="run-through" style:run-through="background" fo:margin-left="0cm" fo:margin-right="0cm" fo:margin-top="0cm" fo:margin-bottom="0.026cm" style:horizontal-pos="from-left" style:horizontal-rel="page-content" style:vertical-pos="from-top" style:vertical-rel="paragraph"/>
    </style:style>
    <style:style style:family="text" style:name="T465">
      <style:text-properties fo:font-family="Tahoma" style:font-family-complex="Tahoma" fo:font-size="9pt" style:font-size-complex="9pt" fo:font-weight="bold"/>
    </style:style>
    <style:style style:family="graphic" style:name="gr6">
      <style:graphic-properties draw:fill-color="#953735" draw:fill="solid" draw:stroke="none" style:wrap="run-through" style:run-through="background" fo:margin-left="0cm" fo:margin-right="0cm" fo:margin-top="0cm" fo:margin-bottom="0cm" style:horizontal-pos="from-left" style:horizontal-rel="page-content" style:vertical-pos="from-top" style:vertical-rel="paragraph"/>
    </style:style>
    <style:style style:family="text" style:name="T466">
      <style:text-properties fo:font-family="Tahoma" style:font-family-complex="Tahoma" fo:font-size="9pt" style:font-size-complex="9pt" fo:font-weight="bold"/>
    </style:style>
    <style:style style:family="text" style:name="T467">
      <style:text-properties fo:font-family="Tahoma" style:font-family-complex="Tahoma" fo:font-size="9pt" style:font-size-complex="9pt" fo:font-weight="bold"/>
    </style:style>
    <style:style style:family="text" style:name="T468">
      <style:text-properties fo:font-family="Tahoma" style:font-family-complex="Tahoma" fo:font-size="9pt" style:font-size-complex="9pt" fo:font-weight="bold"/>
    </style:style>
    <style:style style:family="text" style:name="T469">
      <style:text-properties fo:font-family="Tahoma" style:font-family-complex="Tahoma" fo:font-size="9pt" style:font-size-complex="9pt" fo:font-weight="bold"/>
    </style:style>
    <style:style style:parent-style-name="910" style:family="paragraph" style:name="P51">
      <style:paragraph-properties fo:border-top="0.01764cm solid #000000" fo:border-bottom="none" fo:border-left="none" fo:border-right="none">
        <style:tab-stops>
          <style:tab-stop style:position="15.58cm" style:type="right"/>
        </style:tab-stops>
      </style:paragraph-properties>
      <style:text-properties fo:font-size="6pt" style:font-size-complex="6pt"/>
    </style:style>
    <style:style style:family="text" style:name="T470">
      <style:text-properties fo:font-size="6pt" style:font-size-complex="6pt"/>
    </style:style>
    <style:style style:family="text" style:name="T471">
      <style:text-properties fo:font-size="6pt" style:font-size-complex="6pt"/>
    </style:style>
    <style:style style:family="text" style:name="T472">
      <style:text-properties fo:font-size="6pt" style:font-size-complex="6pt"/>
    </style:style>
    <style:style style:parent-style-name="911" style:family="paragraph" style:name="P52">
      <style:paragraph-properties fo:text-align="center" fo:margin-left="0cm" fo:margin-right="0cm" fo:text-indent="1.748cm" fo:border-top="none" fo:border-bottom="0.01764cm solid #000000" fo:border-left="none" fo:border-right="none">
        <style:tab-stops>
          <style:tab-stop style:position="6.499cm" style:type="center"/>
          <style:tab-stop style:position="7.248cm" style:type="left"/>
          <style:tab-stop style:position="15cm" style:type="right"/>
        </style:tab-stops>
      </style:paragraph-properties>
      <style:text-properties fo:font-family="Tahoma" style:font-family-complex="Tahoma" fo:font-size="8pt" style:font-size-complex="8pt" fo:font-weight="bold"/>
    </style:style>
    <style:style style:family="text" style:name="T473">
      <style:text-properties fo:font-family="Tahoma" style:font-family-complex="Tahoma" fo:font-size="8pt" style:font-size-complex="8pt" fo:font-weight="bold"/>
    </style:style>
    <style:style style:family="text" style:name="T474">
      <style:text-properties fo:font-family="Tahoma" style:font-family-complex="Tahoma" fo:font-size="8pt" style:font-size-complex="8pt" fo:font-weight="bold"/>
    </style:style>
    <style:style style:family="text" style:name="T475">
      <style:text-properties fo:font-family="Tahoma" style:font-family-complex="Tahoma" fo:font-size="8pt" style:font-size-complex="8pt" fo:font-weight="bold"/>
    </style:style>
    <style:style style:parent-style-name="911" style:family="paragraph" style:name="P53">
      <style:paragraph-properties fo:text-align="center" fo:margin-left="0cm" fo:margin-right="2.799cm" fo:text-indent="1.748cm">
        <style:tab-stops>
          <style:tab-stop style:position="6.499cm" style:type="center"/>
          <style:tab-stop style:position="7.248cm" style:type="left"/>
          <style:tab-stop style:position="15cm" style:type="right"/>
        </style:tab-stops>
      </style:paragraph-properties>
      <style:text-properties fo:font-family="Tahoma" style:font-family-complex="Tahoma" fo:font-size="8pt" style:font-size-complex="8pt" fo:font-weight="bold"/>
    </style:style>
    <style:style style:family="text" style:name="T476">
      <style:text-properties fo:font-family="Tahoma" style:font-family-complex="Tahoma" fo:font-size="8pt" style:font-size-complex="8pt" fo:font-weight="bold"/>
    </style:style>
    <style:style style:family="text" style:name="T477">
      <style:text-properties fo:font-family="Tahoma" style:font-family-complex="Tahoma" fo:font-size="8pt" style:font-size-complex="8pt" fo:font-weight="bold"/>
    </style:style>
    <style:style style:family="text" style:name="T478">
      <style:text-properties fo:font-family="Tahoma" style:font-family-complex="Tahoma" fo:font-size="8pt" style:font-size-complex="8pt" fo:font-weight="bold"/>
    </style:style>
    <style:style style:parent-style-name="911" style:family="paragraph" style:name="P54">
      <style:paragraph-properties fo:text-align="center" fo:margin-left="0cm" fo:margin-right="2.799cm" fo:text-indent="1.748cm">
        <style:tab-stops>
          <style:tab-stop style:position="6.499cm" style:type="center"/>
          <style:tab-stop style:position="7.248cm" style:type="left"/>
          <style:tab-stop style:position="14.5cm" style:type="right"/>
        </style:tab-stops>
      </style:paragraph-properties>
      <style:text-properties/>
    </style:style>
    <style:style style:family="graphic" style:name="gr7">
      <style:graphic-properties draw:fill-color="#953735" draw:fill="solid" draw:stroke="none" style:wrap="run-through" style:run-through="background" fo:margin-left="0cm" fo:margin-right="0.026cm" fo:margin-top="0cm" fo:margin-bottom="0cm" style:horizontal-pos="from-left" style:horizontal-rel="page-content" style:vertical-pos="from-top" style:vertical-rel="paragraph"/>
    </style:style>
    <style:style style:parent-style-name="Graphics" style:family="graphic" style:name="gr8">
      <style:graphic-properties draw:image-opacity="100%" style:repeat="stretch" style:wrap="run-through" style:mirror="horizontal" fo:margin-left="0cm" fo:margin-right="0cm" fo:margin-top="0cm" fo:margin-bottom="0cm" style:vertical-pos="middle" style:vertical-rel="baseline" fo:background-color="transparent"/>
    </style:style>
    <style:style style:family="text" style:name="T479">
      <style:text-properties fo:font-family="Tahoma" style:font-family-complex="Tahoma" fo:font-size="8pt" style:font-size-complex="8pt" fo:font-weight="bold"/>
    </style:style>
    <style:style style:family="text" style:name="T480">
      <style:text-properties fo:language="en" fo:country="US"/>
    </style:style>
    <style:style style:parent-style-name="Graphics" style:family="graphic" style:name="gr9">
      <style:graphic-properties draw:image-opacity="100%" style:repeat="stretch" draw:stroke="none" style:wrap="run-through" style:mirror="horizontal" fo:margin-left="0cm" fo:margin-right="0cm" fo:margin-top="0cm" fo:margin-bottom="0cm" style:vertical-pos="middle" style:vertical-rel="baseline" fo:background-color="transparent"/>
    </style:style>
    <style:style style:family="text" style:name="T481">
      <style:text-properties fo:language="en" fo:country="US"/>
    </style:style>
    <style:style style:family="text" style:name="T482">
      <style:text-properties fo:font-family="Tahoma" style:font-family-complex="Tahoma" fo:font-size="8pt" style:font-size-complex="8pt" fo:font-weight="bold"/>
    </style:style>
    <style:style style:parent-style-name="Graphics" style:family="graphic" style:name="gr10">
      <style:graphic-properties draw:image-opacity="100%" style:repeat="stretch" draw:stroke="none" style:wrap="run-through" style:mirror="horizontal" fo:margin-left="0cm" fo:margin-right="0cm" fo:margin-top="0cm" fo:margin-bottom="0cm" style:vertical-pos="middle" style:vertical-rel="baseline" fo:background-color="transparent"/>
    </style:style>
    <style:style style:family="text" style:name="T483">
      <style:text-properties fo:font-family="Tahoma" style:font-family-complex="Tahoma" fo:font-size="8pt" style:font-size-complex="8pt" fo:font-weight="bold"/>
    </style:style>
    <style:style style:parent-style-name="911" style:family="paragraph" style:name="P55">
      <style:paragraph-properties>
        <style:tab-stops>
          <style:tab-stop style:position="7.499cm" style:type="center"/>
          <style:tab-stop style:position="15cm" style:type="right"/>
        </style:tab-stops>
      </style:paragraph-properties>
      <style:text-properties/>
    </style:style>
  </office:automatic-styles>
  <office:master-styles>
    <style:master-page style:name="Standard" style:page-layout-name="Mpm1">
      <style:footer>
        <text:p text:style-name="P52"><text:span text:style-name="T473"/><text:span text:style-name="T474"/><text:span text:style-name="T475"/></text:p>
        <text:p text:style-name="P53"><text:span text:style-name="T476"/><text:span text:style-name="T477"/><text:span text:style-name="T478"/></text:p>
        <text:p text:style-name="P54"><text:span/><draw:custom-shape draw:name="Seta: Pentágono 14" draw:style-name="gr7" draw:z-index="19" draw:transform="rotate(-15.707962977060758) translate(62.37cm,5.894cm)" text:anchor-type="paragraph" svg:width="21.14cm" svg:height="1.588cm"><draw:enhanced-geometry svg:viewBox="0 0 0 0" draw:type="ooxml-homePlate" draw:text-areas="0 0 ?f5 ?f8" draw:modifiers="50000 " draw:enhanced-path="M 0 0 L ?f4 0 ?f9 ?f7 ?f4 ?f8 0 ?f8 Z N"><draw:equation draw:name="f0" draw:formula="min(logwidth,logheight)"/><draw:equation draw:name="f1" draw:formula="100000*logwidth/?f0 "/><draw:equation draw:name="f2" draw:formula="if(0-$0 ,0,if(?f1 -$0 ,$0 ,?f1 ))"/><draw:equation draw:name="f3" draw:formula="?f0 *?f2 /100000"/><draw:equation draw:name="f4" draw:formula="logwidth+0-?f3 "/><draw:equation draw:name="f5" draw:formula="(?f4 +logwidth)/2"/><draw:equation draw:name="f6" draw:formula="?f4 *1/2"/><draw:equation draw:name="f7" draw:formula="logheight/2"/><draw:equation draw:name="f8" draw:formula="logheight"/><draw:equation draw:name="f9" draw:formula="logwidth"/><draw:handle draw:handle-position="?f4 0" draw:handle-range-x-maximum="?f1" draw:handle-range-x-minimum="0"/></draw:enhanced-geometry></draw:custom-shape><text:span/><draw:frame draw:name="Imagem 6" draw:style-name="gr8" text:anchor-type="as-char" svg:width="0.905cm" svg:height="0.818cm" svg:x="0cm" svg:y="0cm"><draw:image xlink:href="Pictures/image2.png" xlink:type="simple" xlink:show="embed" xlink:actuate="onLoad"/></draw:frame><text:span text:style-name="T479">Contago@gcj.adv.br<text:tab/></text:span><text:span/><text:span text:style-name="T480"><text:s text:c="11"/></text:span><text:span/><draw:frame draw:name="Imagem 7" draw:style-name="gr9" draw:transform="rotate(-15.707959777290464) translate(0.595cm,0.595cm)" text:anchor-type="as-char" svg:width="0.595cm" svg:height="0.595cm"><draw:image xlink:href="Pictures/image3.png" xlink:type="simple" xlink:show="embed" xlink:actuate="onLoad"/></draw:frame><text:span text:style-name="T481"><text:s/></text:span><text:span text:style-name="T482"> (47) 3041-6860<text:tab/><text:s text:c="2"/></text:span><text:span/><draw:frame draw:name="Imagem 8" draw:style-name="gr10" draw:transform="rotate(-15.707962977060758) translate(0.715cm,0.713cm)" text:anchor-type="as-char" svg:width="0.715cm" svg:height="0.713cm"><draw:image xlink:href="Pictures/image4.png" xlink:type="simple" xlink:show="embed" xlink:actuate="onLoad"/></draw:frame><text:span text:style-name="T483">(47) 3041-6860</text:span><text:span/></text:p>
        <text:p text:style-name="P55"><text:span/><text:span/></text:p>
      </style:footer>
      <style:header>
        <text:p text:style-name="P50"><text:span text:style-name="T461"/><text:span text:style-name="T462"/><draw:frame draw:name="Imagem 3" draw:style-name="gr3" draw:z-index="7" text:anchor-type="paragraph" svg:width="2.097cm" svg:height="2.097cm" svg:x="14.72cm" svg:y="-1.998cm"><draw:image xlink:href="Pictures/image1.jpg" xlink:type="simple" xlink:show="embed" xlink:actuate="onLoad"/></draw:frame><text:span text:style-name="T463"/><draw:rect draw:name="Retângulo 10" draw:style-name="gr4" draw:z-index="15" text:anchor-type="paragraph" svg:width="1.758cm" svg:height="30.22cm" svg:x="17.65cm" svg:y="-2.546cm"/><text:span text:style-name="T464"/><draw:custom-shape draw:name="Seta: Divisa 17" draw:style-name="gr5" draw:z-index="23" text:anchor-type="paragraph" svg:width="1.429cm" svg:height="0.9381cm" svg:x="-0.4644cm" svg:y="-1.262cm"><draw:enhanced-geometry svg:viewBox="0 0 0 0" draw:type="ooxml-chevron" draw:text-areas="?f7 0 ?f8 ?f10" draw:modifiers="50000 " draw:enhanced-path="M 0 0 L ?f4 0 ?f11 ?f9 ?f4 ?f10 0 ?f10 ?f3 ?f9 Z N"><draw:equation draw:name="f0" draw:formula="min(logwidth,logheight)"/><draw:equation draw:name="f1" draw:formula="100000*logwidth/?f0 "/><draw:equation draw:name="f2" draw:formula="if(0-$0 ,0,if(?f1 -$0 ,$0 ,?f1 ))"/><draw:equation draw:name="f3" draw:formula="?f0 *?f2 /100000"/><draw:equation draw:name="f4" draw:formula="logwidth+0-?f3 "/><draw:equation draw:name="f5" draw:formula="?f4 *1/2"/><draw:equation draw:name="f6" draw:formula="?f4 +0-?f3 "/><draw:equation draw:name="f7" draw:formula="if(?f6 ,?f3 ,0)"/><draw:equation draw:name="f8" draw:formula="if(?f6 ,?f4 ,logwidth)"/><draw:equation draw:name="f9" draw:formula="logheight/2"/><draw:equation draw:name="f10" draw:formula="logheight"/><draw:equation draw:name="f11" draw:formula="logwidth"/><draw:handle draw:handle-position="?f4 0" draw:handle-range-x-maximum="?f1" draw:handle-range-x-minimum="0"/></draw:enhanced-geometry></draw:custom-shape><text:span text:style-name="T465"/><draw:custom-shape draw:name="Igual a 18" draw:style-name="gr6" draw:z-index="27" text:anchor-type="paragraph" svg:width="1.347cm" svg:height="1.626cm" svg:x="-1.799cm" svg:y="-1.611cm"><draw:enhanced-geometry svg:viewBox="0 0 0 0" draw:type="ooxml-mathEqual" draw:text-areas="?f13 ?f10 ?f14 ?f11" draw:modifiers="23520 11760 " draw:enhanced-path="M ?f13 ?f10 L ?f14 ?f10 ?f14 ?f8 ?f13 ?f8 Z M ?f13 ?f9 L ?f14 ?f9 ?f14 ?f11 ?f13 ?f11 Z N"><draw:equation draw:name="f0" draw:formula="if(0-$0 ,0,if(36745-$0 ,$0 ,36745))"/><draw:equation draw:name="f1" draw:formula="?f0 *2/1"/><draw:equation draw:name="f2" draw:formula="100000+0-2"/><draw:equation draw:name="f3" draw:formula="if(0-$1 ,0,if(?f2 -$1 ,$1 ,?f2 ))"/><draw:equation draw:name="f4" draw:formula="logheight*?f0 /100000"/><draw:equation draw:name="f5" draw:formula="logheight*?f3 /200000"/><draw:equation draw:name="f6" draw:formula="logwidth*73490/200000"/><draw:equation draw:name="f7" draw:formula="logheight/2"/><draw:equation draw:name="f8" draw:formula="?f7 +0-?f5 "/><draw:equation draw:name="f9" draw:formula="?f7 +?f5 -0"/><draw:equation draw:name="f10" draw:formula="?f8 +0-?f4 "/><draw:equation draw:name="f11" draw:formula="?f9 +?f4 -0"/><draw:equation draw:name="f12" draw:formula="logwidth/2"/><draw:equation draw:name="f13" draw:formula="?f12 +0-?f6 "/><draw:equation draw:name="f14" draw:formula="?f12 +?f6 -0"/><draw:equation draw:name="f15" draw:formula="(?f10 +?f8 )/2"/><draw:equation draw:name="f16" draw:formula="(?f9 +?f11 )/2"/><draw:equation draw:name="f17" draw:formula="logwidth"/><draw:handle draw:handle-position="0 ?f10" draw:handle-range-y-maximum="36745" draw:handle-range-y-minimum="0"/><draw:handle draw:handle-position="?f17 ?f8" draw:handle-range-y-maximum="?f2" draw:handle-range-y-minimum="0"/></draw:enhanced-geometry></draw:custom-shape><text:span text:style-name="T466"/><text:span text:style-name="T467"/><text:span/><text:span text:style-name="T468"/><text:span text:style-name="T469"/></text:p>
        <text:p text:style-name="P51"><text:span text:style-name="T470"/><text:span text:style-name="T471"/><text:span text:style-name="T472"/></text:p>
      </style:header>
    </style:master-page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  <meta:creation-date>2025-11-03T18:53:00Z</meta:creation-date>
    <dc:title>CONTRATO DE HONORÁRIOS</dc:title>
    <meta:user-defined meta:name="AppVersion" meta:value-type="string">16.0000</meta:user-defined>
    <meta:user-defined meta:name="Created" meta:value-type="string">2024-11-07T00:00:00</meta:user-defined>
    <meta:user-defined meta:name="LastSaved" meta:value-type="string">2024-11-07T00:00:00</meta:user-defined>
    <meta:user-defined meta:name="Producer" meta:value-type="string">GPL Ghostscript 9.26</meta:user-defined>
  </office:meta>
</office:document-meta>
</file>